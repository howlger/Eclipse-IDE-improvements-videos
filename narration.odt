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fo:break-before="page"/>
      <style:text-properties fo:color="#999999" loext:opacity="100%" fo:language="en" fo:country="US" fo:font-weight="bold" officeooo:rsid="0032f19b" officeooo:paragraph-rsid="05ff6939" fo:background-color="transparent" style:font-weight-asian="bold" style:font-weight-complex="bold"/>
    </style:style>
    <style:style style:name="P2" style:family="paragraph" style:parent-style-name="Standard">
      <style:text-properties fo:font-size="6pt" fo:language="en" fo:country="US" fo:font-weight="bold" officeooo:rsid="00119e79" officeooo:paragraph-rsid="05ff6939" fo:background-color="#ffff00" style:font-size-asian="5.25pt" style:font-weight-asian="bold" style:font-size-complex="6pt" style:font-weight-complex="bold"/>
    </style:style>
    <style:style style:name="P3" style:family="paragraph" style:parent-style-name="Standard">
      <style:text-properties officeooo:paragraph-rsid="05ff6939"/>
    </style:style>
    <style:style style:name="P4" style:family="paragraph" style:parent-style-name="Standard">
      <style:text-properties fo:language="en" fo:country="US" fo:font-weight="bold" officeooo:rsid="0032f19b" officeooo:paragraph-rsid="05ff6939" fo:background-color="transparent" style:font-weight-asian="bold" style:font-weight-complex="bold"/>
    </style:style>
    <style:style style:name="P5" style:family="paragraph" style:parent-style-name="Standard">
      <style:text-properties fo:language="en" fo:country="US" fo:font-weight="bold" officeooo:rsid="001e4eb8" officeooo:paragraph-rsid="05ff6939" style:font-weight-asian="bold" style:font-weight-complex="bold"/>
    </style:style>
    <style:style style:name="P6" style:family="paragraph" style:parent-style-name="Standard">
      <style:text-properties fo:language="en" fo:country="US" officeooo:paragraph-rsid="07b28890"/>
    </style:style>
    <style:style style:name="P7" style:family="paragraph" style:parent-style-name="Standard">
      <style:text-properties fo:font-size="6pt" fo:language="en" fo:country="US" fo:font-weight="bold" officeooo:rsid="001e4eb8" officeooo:paragraph-rsid="07b28890" style:font-size-asian="6pt" style:font-weight-asian="bold" style:font-size-complex="6pt" style:font-weight-complex="bold"/>
    </style:style>
    <style:style style:name="P8" style:family="paragraph" style:parent-style-name="Standard">
      <style:text-properties officeooo:paragraph-rsid="07b28890"/>
    </style:style>
    <style:style style:name="P9" style:family="paragraph" style:parent-style-name="Standard">
      <style:text-properties fo:font-size="6pt" fo:language="en" fo:country="US" fo:font-weight="bold" officeooo:rsid="001e4eb8" officeooo:paragraph-rsid="06b3db9f" style:font-size-asian="6pt" style:font-weight-asian="bold" style:font-size-complex="6pt" style:font-weight-complex="bold"/>
    </style:style>
    <style:style style:name="P10" style:family="paragraph" style:parent-style-name="Standard">
      <style:paragraph-properties style:writing-mode="lr-tb" style:writing-mode-automatic="false"/>
      <style:text-properties officeooo:paragraph-rsid="07de2a7b"/>
    </style:style>
    <style:style style:name="P11" style:family="paragraph" style:parent-style-name="Standard">
      <style:text-properties officeooo:paragraph-rsid="07b6c61b"/>
    </style:style>
    <style:style style:name="P12" style:family="paragraph" style:parent-style-name="Standard">
      <style:text-properties officeooo:paragraph-rsid="07bdcfbe"/>
    </style:style>
    <style:style style:name="P13" style:family="paragraph" style:parent-style-name="Standard">
      <style:text-properties officeooo:paragraph-rsid="07bf715c"/>
    </style:style>
    <style:style style:name="P14" style:family="paragraph" style:parent-style-name="Standard">
      <style:text-properties officeooo:rsid="07c12001" officeooo:paragraph-rsid="07df0476"/>
    </style:style>
    <style:style style:name="P15" style:family="paragraph" style:parent-style-name="Standard">
      <style:text-properties officeooo:rsid="07c12001" officeooo:paragraph-rsid="07c3340b"/>
    </style:style>
    <style:style style:name="P16" style:family="paragraph" style:parent-style-name="Standard">
      <style:text-properties fo:language="en" fo:country="US" fo:font-weight="normal" officeooo:rsid="07b8eee3" officeooo:paragraph-rsid="07c850b5" fo:background-color="#dddddd" style:font-weight-asian="normal" style:font-weight-complex="normal"/>
    </style:style>
    <style:style style:name="P17" style:family="paragraph" style:parent-style-name="Standard">
      <style:text-properties officeooo:rsid="07c6e29e" officeooo:paragraph-rsid="07c6e29e"/>
    </style:style>
    <style:style style:name="P18" style:family="paragraph" style:parent-style-name="Standard">
      <style:text-properties officeooo:paragraph-rsid="07c850b5"/>
    </style:style>
    <style:style style:name="P19" style:family="paragraph" style:parent-style-name="Standard">
      <style:text-properties officeooo:paragraph-rsid="07c6e29e"/>
    </style:style>
    <style:style style:name="P20" style:family="paragraph" style:parent-style-name="Standard">
      <style:text-properties officeooo:paragraph-rsid="07c9df3b"/>
    </style:style>
    <style:style style:name="P21" style:family="paragraph" style:parent-style-name="Standard">
      <style:text-properties fo:language="en" fo:country="US" fo:font-weight="normal" officeooo:rsid="077024ff" officeooo:paragraph-rsid="07b6c61b" fo:background-color="transparent" style:font-weight-asian="normal" style:font-weight-complex="normal"/>
    </style:style>
    <style:style style:name="P22" style:family="paragraph" style:parent-style-name="Standard">
      <style:text-properties fo:language="en" fo:country="US" fo:font-weight="normal" officeooo:rsid="05b3289d" officeooo:paragraph-rsid="07886822" fo:background-color="transparent" style:font-weight-asian="normal" style:font-weight-complex="normal"/>
    </style:style>
    <style:style style:name="P23" style:family="paragraph" style:parent-style-name="Standard">
      <style:text-properties officeooo:paragraph-rsid="07886822"/>
    </style:style>
    <style:style style:name="P24" style:family="paragraph" style:parent-style-name="Standard">
      <style:text-properties fo:font-size="6pt" fo:language="en" fo:country="US" fo:font-weight="bold" officeooo:rsid="001e4eb8" officeooo:paragraph-rsid="07886822" style:font-size-asian="6pt" style:font-weight-asian="bold" style:font-size-complex="6pt" style:font-weight-complex="bold"/>
    </style:style>
    <style:style style:name="P25" style:family="paragraph" style:parent-style-name="Standard">
      <style:text-properties fo:language="en" fo:country="US" fo:font-weight="normal" officeooo:rsid="07b8eee3" officeooo:paragraph-rsid="07cbba5a" fo:background-color="#dddddd" style:font-weight-asian="normal" style:font-weight-complex="normal"/>
    </style:style>
    <style:style style:name="P26" style:family="paragraph" style:parent-style-name="Standard">
      <style:text-properties fo:language="en" fo:country="US" fo:font-weight="normal" officeooo:rsid="07bf715c" officeooo:paragraph-rsid="07bf715c" fo:background-color="transparent" style:font-weight-asian="normal" style:font-weight-complex="normal"/>
    </style:style>
    <style:style style:name="P27" style:family="paragraph" style:parent-style-name="Standard">
      <style:text-properties officeooo:paragraph-rsid="07d3c24a"/>
    </style:style>
    <style:style style:name="P28" style:family="paragraph" style:parent-style-name="Standard">
      <style:text-properties officeooo:paragraph-rsid="07d5f21e"/>
    </style:style>
    <style:style style:name="P29" style:family="paragraph" style:parent-style-name="Standard">
      <style:text-properties fo:language="en" fo:country="US" fo:font-weight="normal" officeooo:rsid="07d538ba" officeooo:paragraph-rsid="07d538ba" fo:background-color="transparent" style:font-weight-asian="normal" style:font-weight-complex="normal"/>
    </style:style>
    <style:style style:name="P30" style:family="paragraph" style:parent-style-name="Standard">
      <style:text-properties fo:language="en" fo:country="US" fo:font-weight="normal" officeooo:rsid="05b3289d" officeooo:paragraph-rsid="07d03882" fo:background-color="transparent" style:font-weight-asian="normal" style:font-weight-complex="normal"/>
    </style:style>
    <style:style style:name="P31" style:family="paragraph" style:parent-style-name="Standard">
      <style:text-properties officeooo:paragraph-rsid="07e3dd28"/>
    </style:style>
    <style:style style:name="P32" style:family="paragraph" style:parent-style-name="Standard">
      <style:text-properties fo:language="en" fo:country="US" fo:font-style="normal" fo:font-weight="normal" officeooo:rsid="07bf715c" officeooo:paragraph-rsid="07bf715c" fo:background-color="transparent" style:font-style-asian="normal" style:font-weight-asian="normal" style:font-style-complex="normal" style:font-weight-complex="normal"/>
    </style:style>
    <style:style style:name="P33" style:family="paragraph" style:parent-style-name="Standard">
      <style:text-properties officeooo:paragraph-rsid="07db5bec"/>
    </style:style>
    <style:style style:name="P34" style:family="paragraph" style:parent-style-name="Standard">
      <style:text-properties officeooo:paragraph-rsid="07dc94bb"/>
    </style:style>
    <style:style style:name="P35" style:family="paragraph" style:parent-style-name="Standard">
      <style:text-properties fo:language="en" fo:country="US" fo:font-weight="normal" officeooo:rsid="06751036" officeooo:paragraph-rsid="07bf715c" fo:background-color="transparent" style:font-weight-asian="normal" style:font-weight-complex="normal"/>
    </style:style>
    <style:style style:name="P36" style:family="paragraph" style:parent-style-name="Standard">
      <style:text-properties fo:color="#999999" loext:opacity="100%" fo:language="en" fo:country="US" fo:font-weight="bold" officeooo:rsid="003b1ec5" officeooo:paragraph-rsid="05c96408" style:font-weight-asian="bold" style:font-weight-complex="bold"/>
    </style:style>
    <style:style style:name="P37" style:family="paragraph" style:parent-style-name="Standard">
      <style:text-properties fo:font-size="6pt" fo:language="en" fo:country="US" fo:font-weight="normal" officeooo:rsid="003b1ec5" officeooo:paragraph-rsid="049fc303" style:font-size-asian="6pt" style:font-weight-asian="normal" style:font-size-complex="6pt" style:font-weight-complex="normal"/>
    </style:style>
    <style:style style:name="P38" style:family="paragraph" style:parent-style-name="Standard">
      <style:text-properties officeooo:paragraph-rsid="049fc303"/>
    </style:style>
    <style:style style:name="P39" style:family="paragraph" style:parent-style-name="Standard">
      <style:text-properties fo:language="en" fo:country="US" officeooo:rsid="003b1ec5" officeooo:paragraph-rsid="049fc303"/>
    </style:style>
    <style:style style:name="P40" style:family="paragraph" style:parent-style-name="Text_20_body">
      <style:text-properties officeooo:paragraph-rsid="06fd0dfe"/>
    </style:style>
    <style:style style:name="P41" style:family="paragraph" style:parent-style-name="Standard">
      <style:paragraph-properties fo:text-align="justify" style:justify-single-word="false"/>
      <style:text-properties fo:color="#999999" loext:opacity="100%" fo:font-size="10pt" fo:language="en" fo:country="US" fo:font-weight="bold" officeooo:rsid="05ff6939" officeooo:paragraph-rsid="05ff6939" fo:background-color="transparent"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color="#999999" loext:opacity="100%" fo:font-size="10pt" fo:language="en" fo:country="US" fo:font-weight="bold" officeooo:rsid="0032f19b" officeooo:paragraph-rsid="05ff6939" fo:background-color="transparent" style:font-size-asian="10pt" style:font-weight-asian="bold" style:font-size-complex="10pt" style:font-weight-complex="bold"/>
    </style:style>
    <style:style style:name="P43" style:family="paragraph" style:parent-style-name="Standard" style:list-style-name="L1">
      <style:paragraph-properties fo:text-align="justify" style:justify-single-word="false"/>
      <style:text-properties fo:color="#999999" loext:opacity="100%" fo:font-size="10pt" fo:language="en" fo:country="US" fo:font-weight="bold" officeooo:rsid="0032f19b" officeooo:paragraph-rsid="05ff6939" fo:background-color="transparent" style:font-size-asian="10pt" style:font-weight-asian="bold" style:font-size-complex="10pt" style:font-weight-complex="bold"/>
    </style:style>
    <style:style style:name="T1" style:family="text">
      <style:text-properties officeooo:rsid="0043d0fb"/>
    </style:style>
    <style:style style:name="T2" style:family="text">
      <style:text-properties fo:language="en" fo:country="US" officeooo:rsid="00136227"/>
    </style:style>
    <style:style style:name="T3" style:family="text">
      <style:text-properties fo:language="en" fo:country="US" fo:font-weight="bold" officeooo:rsid="00ab4647" fo:background-color="#fff200" loext:char-shading-value="0" style:font-weight-asian="bold" style:font-weight-complex="bold"/>
    </style:style>
    <style:style style:name="T4" style:family="text">
      <style:text-properties fo:language="en" fo:country="US" fo:font-weight="bold" officeooo:rsid="00d88c8c" fo:background-color="#fff200" loext:char-shading-value="0" style:font-weight-asian="bold" style:font-weight-complex="bold"/>
    </style:style>
    <style:style style:name="T5" style:family="text">
      <style:text-properties fo:language="en" fo:country="US" fo:font-weight="bold" officeooo:rsid="00136227" style:font-weight-asian="bold" style:font-weight-complex="bold"/>
    </style:style>
    <style:style style:name="T6" style:family="text">
      <style:text-properties fo:language="en" fo:country="US" fo:font-weight="bold" officeooo:rsid="00d88c8c" style:font-weight-asian="bold" style:font-weight-complex="bold"/>
    </style:style>
    <style:style style:name="T7" style:family="text">
      <style:text-properties fo:language="en" fo:country="US" fo:font-weight="bold" officeooo:rsid="0032ee51" style:font-weight-asian="bold" style:font-weight-complex="bold"/>
    </style:style>
    <style:style style:name="T8" style:family="text">
      <style:text-properties fo:language="en" fo:country="US" fo:font-weight="normal" officeooo:rsid="0032ee51" style:font-weight-asian="normal" style:font-weight-complex="normal"/>
    </style:style>
    <style:style style:name="T9" style:family="text">
      <style:text-properties fo:language="en" fo:country="US" fo:font-weight="bold" officeooo:rsid="0094c10f" fo:background-color="#fff200" loext:char-shading-value="0" style:font-weight-asian="bold" style:font-weight-complex="bold"/>
    </style:style>
    <style:style style:name="T10" style:family="text">
      <style:text-properties fo:language="en" fo:country="US" fo:font-weight="bold" officeooo:rsid="07b14799" fo:background-color="#fff200" loext:char-shading-value="0" style:font-weight-asian="bold" style:font-weight-complex="bold"/>
    </style:style>
    <style:style style:name="T11" style:family="text">
      <style:text-properties fo:language="en" fo:country="US" fo:font-weight="normal" officeooo:rsid="00d88c8c" style:font-weight-asian="normal" style:font-weight-complex="normal"/>
    </style:style>
    <style:style style:name="T12" style:family="text">
      <style:text-properties fo:language="en" fo:country="US" fo:font-weight="normal" officeooo:rsid="0100f487" fo:background-color="#dddddd" loext:char-shading-value="0" style:font-weight-asian="normal" style:font-weight-complex="normal"/>
    </style:style>
    <style:style style:name="T13" style:family="text">
      <style:text-properties fo:language="en" fo:country="US" fo:font-weight="normal" officeooo:rsid="07b14799" style:font-weight-asian="normal" style:font-weight-complex="normal"/>
    </style:style>
    <style:style style:name="T14" style:family="text">
      <style:text-properties fo:language="en" fo:country="US" fo:font-weight="normal" officeooo:rsid="00357d7d" fo:background-color="#dddddd" loext:char-shading-value="0" style:font-weight-asian="normal" style:font-weight-complex="normal"/>
    </style:style>
    <style:style style:name="T15" style:family="text">
      <style:text-properties fo:language="en" fo:country="US" fo:font-weight="bold" officeooo:rsid="0100f487" fo:background-color="#dddddd" loext:char-shading-value="0" style:font-weight-asian="bold" style:font-weight-complex="bold"/>
    </style:style>
    <style:style style:name="T16" style:family="text">
      <style:text-properties fo:language="en" fo:country="US" fo:font-weight="bold" officeooo:rsid="07b14799" fo:background-color="#dddddd" loext:char-shading-value="0" style:font-weight-asian="bold" style:font-weight-complex="bold"/>
    </style:style>
    <style:style style:name="T17" style:family="text">
      <style:text-properties fo:language="en" fo:country="US" fo:font-weight="normal" officeooo:rsid="0014eac0" fo:background-color="#dddddd" loext:char-shading-value="0" style:font-weight-asian="normal" style:font-weight-complex="normal"/>
    </style:style>
    <style:style style:name="T18" style:family="text">
      <style:text-properties fo:language="en" fo:country="US" fo:font-weight="normal" officeooo:rsid="00a176b7" fo:background-color="#dddddd" loext:char-shading-value="0" style:font-weight-asian="normal" style:font-weight-complex="normal"/>
    </style:style>
    <style:style style:name="T19" style:family="text">
      <style:text-properties fo:color="#999999" loext:opacity="100%" fo:font-weight="bold" officeooo:rsid="001e4eb8" style:font-weight-asian="bold" style:font-weight-complex="bold"/>
    </style:style>
    <style:style style:name="T20" style:family="text">
      <style:text-properties fo:color="#999999" loext:opacity="100%" fo:font-weight="bold" officeooo:rsid="00373dfb" style:font-weight-asian="bold" style:font-weight-complex="bold"/>
    </style:style>
    <style:style style:name="T21" style:family="text">
      <style:text-properties fo:color="#999999" loext:opacity="100%" fo:font-weight="bold" officeooo:rsid="01ebd016" style:font-weight-asian="bold" style:font-weight-complex="bold"/>
    </style:style>
    <style:style style:name="T22" style:family="text">
      <style:text-properties fo:color="#999999" loext:opacity="100%" fo:font-weight="bold" officeooo:rsid="075a40ff" style:font-weight-asian="bold" style:font-weight-complex="bold"/>
    </style:style>
    <style:style style:name="T23" style:family="text">
      <style:text-properties fo:color="#999999" loext:opacity="100%" fo:font-weight="bold" officeooo:rsid="07b28890" style:font-weight-asian="bold" style:font-weight-complex="bold"/>
    </style:style>
    <style:style style:name="T24" style:family="text">
      <style:text-properties fo:color="#999999" loext:opacity="100%" fo:font-weight="bold" officeooo:rsid="0635d95a" style:font-weight-asian="bold" style:font-weight-complex="bold"/>
    </style:style>
    <style:style style:name="T25" style:family="text">
      <style:text-properties officeooo:rsid="05b3289d"/>
    </style:style>
    <style:style style:name="T26" style:family="text">
      <style:text-properties officeooo:rsid="00d88c8c"/>
    </style:style>
    <style:style style:name="T27" style:family="text">
      <style:text-properties officeooo:rsid="06dc4751"/>
    </style:style>
    <style:style style:name="T28" style:family="text">
      <style:text-properties fo:language="en" fo:country="US" fo:font-weight="bold" officeooo:rsid="007d3450" fo:background-color="#fff200" loext:char-shading-value="0" style:font-weight-asian="bold" style:font-weight-complex="bold"/>
    </style:style>
    <style:style style:name="T29" style:family="text">
      <style:text-properties fo:language="en" fo:country="US" fo:font-weight="bold" officeooo:rsid="07b28890" fo:background-color="#fff200" loext:char-shading-value="0" style:font-weight-asian="bold" style:font-weight-complex="bold"/>
    </style:style>
    <style:style style:name="T30" style:family="text">
      <style:text-properties officeooo:rsid="05b3289d" fo:background-color="transparent" loext:char-shading-value="0"/>
    </style:style>
    <style:style style:name="T31" style:family="text">
      <style:text-properties officeooo:rsid="0100f487" fo:background-color="transparent" loext:char-shading-value="0"/>
    </style:style>
    <style:style style:name="T32" style:family="text">
      <style:text-properties fo:font-weight="bold" officeooo:rsid="06196c44" fo:background-color="transparent" loext:char-shading-value="0" style:font-weight-asian="bold" style:font-weight-complex="bold"/>
    </style:style>
    <style:style style:name="T33" style:family="text">
      <style:text-properties fo:font-weight="bold" officeooo:rsid="05b3289d" fo:background-color="transparent" loext:char-shading-value="0" style:font-weight-asian="bold" style:font-weight-complex="bold"/>
    </style:style>
    <style:style style:name="T34" style:family="text">
      <style:text-properties fo:font-weight="bold" officeooo:rsid="0100f487" fo:background-color="transparent" loext:char-shading-value="0" style:font-weight-asian="bold" style:font-weight-complex="bold"/>
    </style:style>
    <style:style style:name="T35" style:family="text">
      <style:text-properties fo:font-weight="bold" officeooo:rsid="0100f487" style:font-weight-asian="bold" style:font-weight-complex="bold"/>
    </style:style>
    <style:style style:name="T36" style:family="text">
      <style:text-properties officeooo:rsid="061613ee"/>
    </style:style>
    <style:style style:name="T37" style:family="text">
      <style:text-properties officeooo:rsid="0100f487"/>
    </style:style>
    <style:style style:name="T38" style:family="text">
      <style:text-properties fo:font-weight="bold" style:font-weight-asian="bold" style:font-weight-complex="bold"/>
    </style:style>
    <style:style style:name="T39" style:family="text">
      <style:text-properties fo:font-weight="bold" officeooo:rsid="0351abe9" style:font-weight-asian="bold" style:font-weight-complex="bold"/>
    </style:style>
    <style:style style:name="T40" style:family="text">
      <style:text-properties officeooo:rsid="07e5f661"/>
    </style:style>
    <style:style style:name="T41" style:family="text">
      <style:text-properties officeooo:rsid="077752df"/>
    </style:style>
    <style:style style:name="T42" style:family="text">
      <style:text-properties officeooo:rsid="075a40ff"/>
    </style:style>
    <style:style style:name="T43" style:family="text">
      <style:text-properties officeooo:rsid="0623a473"/>
    </style:style>
    <style:style style:name="T44" style:family="text">
      <style:text-properties fo:font-style="italic" fo:font-weight="bold" officeooo:rsid="007d3450" fo:background-color="#fff200" loext:char-shading-value="0" style:font-style-asian="italic" style:font-weight-asian="bold" style:font-style-complex="italic" style:font-weight-complex="bold"/>
    </style:style>
    <style:style style:name="T45" style:family="text">
      <style:text-properties fo:font-weight="bold" officeooo:rsid="0623a473" style:font-weight-asian="bold" style:font-weight-complex="bold"/>
    </style:style>
    <style:style style:name="T46" style:family="text">
      <style:text-properties fo:font-weight="bold" officeooo:rsid="07b7dfaf" style:font-weight-asian="bold" style:font-weight-complex="bold"/>
    </style:style>
    <style:style style:name="T47" style:family="text">
      <style:text-properties officeooo:rsid="07de2a7b"/>
    </style:style>
    <style:style style:name="T48" style:family="text">
      <style:text-properties officeooo:rsid="07de05dc"/>
    </style:style>
    <style:style style:name="T49" style:family="text">
      <style:text-properties fo:font-weight="normal" officeooo:rsid="0623a473" style:font-weight-asian="normal" style:font-weight-complex="normal"/>
    </style:style>
    <style:style style:name="T50" style:family="text">
      <style:text-properties fo:font-weight="normal" officeooo:rsid="07b8eee3" style:font-weight-asian="normal" style:font-weight-complex="normal"/>
    </style:style>
    <style:style style:name="T51" style:family="text">
      <style:text-properties fo:font-weight="normal" officeooo:rsid="07de2a7b" style:font-weight-asian="normal" style:font-weight-complex="normal"/>
    </style:style>
    <style:style style:name="T52" style:family="text">
      <style:text-properties fo:font-weight="bold" officeooo:rsid="07b8eee3" style:font-weight-asian="bold" style:font-weight-complex="bold"/>
    </style:style>
    <style:style style:name="T53" style:family="text">
      <style:text-properties officeooo:rsid="07b8eee3"/>
    </style:style>
    <style:style style:name="T54" style:family="text">
      <style:text-properties officeooo:rsid="07b7dfaf"/>
    </style:style>
    <style:style style:name="T55" style:family="text">
      <style:text-properties fo:color="#999999" loext:opacity="100%" fo:language="en" fo:country="US" fo:font-style="normal" fo:font-weight="normal" officeooo:rsid="028af2ba" fo:background-color="transparent" loext:char-shading-value="0" style:font-style-asian="normal" style:font-weight-asian="normal" style:font-style-complex="normal" style:font-weight-complex="normal"/>
    </style:style>
    <style:style style:name="T56" style:family="text">
      <style:text-properties fo:color="#999999" loext:opacity="100%" fo:language="en" fo:country="US" fo:font-style="normal" fo:font-weight="normal" officeooo:rsid="03bb9eb9" fo:background-color="transparent" loext:char-shading-value="0" style:font-style-asian="normal" style:font-weight-asian="normal" style:font-style-complex="normal" style:font-weight-complex="normal"/>
    </style:style>
    <style:style style:name="T57" style:family="text">
      <style:text-properties fo:font-weight="bold" officeooo:rsid="07b7bcf5" style:font-weight-asian="bold" style:font-weight-complex="bold"/>
    </style:style>
    <style:style style:name="T58" style:family="text">
      <style:text-properties officeooo:rsid="07b7bcf5"/>
    </style:style>
    <style:style style:name="T59" style:family="text">
      <style:text-properties fo:font-weight="normal" officeooo:rsid="07de05dc" style:font-weight-asian="normal" style:font-weight-complex="normal"/>
    </style:style>
    <style:style style:name="T60" style:family="text">
      <style:text-properties fo:font-style="italic" fo:font-weight="bold" officeooo:rsid="07b7dfaf" style:font-style-asian="italic" style:font-weight-asian="bold" style:font-style-complex="italic" style:font-weight-complex="bold"/>
    </style:style>
    <style:style style:name="T61" style:family="text">
      <style:text-properties fo:font-style="italic" officeooo:rsid="07b7dfaf" style:font-style-asian="italic" style:font-style-complex="italic"/>
    </style:style>
    <style:style style:name="T62" style:family="text">
      <style:text-properties fo:language="en" fo:country="US" fo:font-weight="normal" officeooo:rsid="07b8eee3" fo:background-color="#dddddd" loext:char-shading-value="0" style:font-weight-asian="normal" style:font-weight-complex="normal"/>
    </style:style>
    <style:style style:name="T63" style:family="text">
      <style:text-properties fo:font-weight="normal" officeooo:rsid="07b7dfaf"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7bc4113" style:font-weight-asian="normal" style:font-weight-complex="normal"/>
    </style:style>
    <style:style style:name="T66" style:family="text">
      <style:text-properties fo:font-weight="bold" officeooo:rsid="07bc4113" style:font-weight-asian="bold" style:font-weight-complex="bold"/>
    </style:style>
    <style:style style:name="T67" style:family="text">
      <style:text-properties fo:font-weight="normal" officeooo:rsid="07bdcfbe" style:font-weight-asian="normal" style:font-weight-complex="normal"/>
    </style:style>
    <style:style style:name="T68" style:family="text">
      <style:text-properties fo:font-weight="normal" officeooo:rsid="07e5f661" style:font-weight-asian="normal" style:font-weight-complex="normal"/>
    </style:style>
    <style:style style:name="T69" style:family="text">
      <style:text-properties fo:font-weight="bold" officeooo:rsid="07bf2f7a" style:font-weight-asian="bold" style:font-weight-complex="bold"/>
    </style:style>
    <style:style style:name="T70" style:family="text">
      <style:text-properties officeooo:rsid="07b93aed"/>
    </style:style>
    <style:style style:name="T71" style:family="text">
      <style:text-properties fo:language="en" fo:country="US" fo:font-weight="normal" officeooo:rsid="07b93aed" fo:background-color="#dddddd" loext:char-shading-value="0" style:font-weight-asian="normal" style:font-weight-complex="normal"/>
    </style:style>
    <style:style style:name="T72" style:family="text">
      <style:text-properties fo:font-weight="bold" officeooo:rsid="07e5f661" style:font-weight-asian="bold" style:font-weight-complex="bold"/>
    </style:style>
    <style:style style:name="T73" style:family="text">
      <style:text-properties officeooo:rsid="07bf2f7a"/>
    </style:style>
    <style:style style:name="T74" style:family="text">
      <style:text-properties fo:font-style="italic" officeooo:rsid="07bf2f7a" style:font-style-asian="italic" style:font-style-complex="italic"/>
    </style:style>
    <style:style style:name="T75" style:family="text">
      <style:text-properties fo:font-style="italic" fo:font-weight="bold" officeooo:rsid="07bf2f7a" style:font-style-asian="italic" style:font-weight-asian="bold" style:font-style-complex="italic" style:font-weight-complex="bold"/>
    </style:style>
    <style:style style:name="T76" style:family="text">
      <style:text-properties fo:font-style="italic" officeooo:rsid="07bf715c" style:font-style-asian="italic" style:font-style-complex="italic"/>
    </style:style>
    <style:style style:name="T77" style:family="text">
      <style:text-properties officeooo:rsid="07bf715c"/>
    </style:style>
    <style:style style:name="T78" style:family="text">
      <style:text-properties fo:font-weight="bold" officeooo:rsid="07bf715c" style:font-weight-asian="bold" style:font-weight-complex="bold"/>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style:font-style-asian="italic" style:font-style-complex="italic"/>
    </style:style>
    <style:style style:name="T81" style:family="text">
      <style:text-properties officeooo:rsid="07df0476"/>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officeooo:rsid="07c16bce"/>
    </style:style>
    <style:style style:name="T84" style:family="text">
      <style:text-properties officeooo:rsid="07c50e63"/>
    </style:style>
    <style:style style:name="T85" style:family="text">
      <style:text-properties fo:font-style="italic" officeooo:rsid="07c50e63" style:font-style-asian="italic" style:font-style-complex="italic"/>
    </style:style>
    <style:style style:name="T86" style:family="text">
      <style:text-properties fo:language="en" fo:country="US" fo:font-weight="normal" officeooo:rsid="07c9df3b" fo:background-color="#dddddd" loext:char-shading-value="0" style:font-weight-asian="normal" style:font-weight-complex="normal"/>
    </style:style>
    <style:style style:name="T87" style:family="text">
      <style:text-properties fo:language="en" fo:country="US" fo:font-weight="normal" officeooo:rsid="07e5f661" fo:background-color="#dddddd" loext:char-shading-value="0" style:font-weight-asian="normal" style:font-weight-complex="normal"/>
    </style:style>
    <style:style style:name="T88" style:family="text">
      <style:text-properties officeooo:rsid="07c92025"/>
    </style:style>
    <style:style style:name="T89" style:family="text">
      <style:text-properties fo:font-weight="bold" officeooo:rsid="07c92025" style:font-weight-asian="bold" style:font-weight-complex="bold"/>
    </style:style>
    <style:style style:name="T90" style:family="text">
      <style:text-properties fo:font-style="italic" officeooo:rsid="07c92025" style:font-style-asian="italic" style:font-style-complex="italic"/>
    </style:style>
    <style:style style:name="T91" style:family="text">
      <style:text-properties fo:font-style="italic" fo:font-weight="bold" officeooo:rsid="07c92025" style:font-style-asian="italic" style:font-weight-asian="bold" style:font-style-complex="italic" style:font-weight-complex="bold"/>
    </style:style>
    <style:style style:name="T92" style:family="text">
      <style:text-properties officeooo:rsid="07c9df3b"/>
    </style:style>
    <style:style style:name="T93" style:family="text">
      <style:text-properties fo:color="#999999" loext:opacity="100%" fo:language="en" fo:country="US" fo:font-weight="bold" officeooo:rsid="001e4eb8" style:font-weight-asian="bold" style:font-weight-complex="bold"/>
    </style:style>
    <style:style style:name="T94" style:family="text">
      <style:text-properties fo:color="#999999" loext:opacity="100%" fo:language="en" fo:country="US" fo:font-weight="bold" officeooo:rsid="05cc65ea" style:font-weight-asian="bold" style:font-weight-complex="bold"/>
    </style:style>
    <style:style style:name="T95" style:family="text">
      <style:text-properties fo:color="#999999" loext:opacity="100%" fo:language="en" fo:country="US" fo:font-weight="bold" officeooo:rsid="03efad13" style:font-weight-asian="bold" style:font-weight-complex="bold"/>
    </style:style>
    <style:style style:name="T96" style:family="text">
      <style:text-properties officeooo:rsid="07ce125d"/>
    </style:style>
    <style:style style:name="T97" style:family="text">
      <style:text-properties fo:language="en" fo:country="US" fo:font-weight="normal" officeooo:rsid="07d3c24a" fo:background-color="#dddddd" loext:char-shading-value="0" style:font-weight-asian="normal" style:font-weight-complex="normal"/>
    </style:style>
    <style:style style:name="T98" style:family="text">
      <style:text-properties fo:language="en" fo:country="US" fo:font-style="italic" fo:font-weight="bold" officeooo:rsid="07b8eee3" fo:background-color="#dddddd" loext:char-shading-value="0" style:font-style-asian="italic" style:font-weight-asian="bold" style:font-style-complex="italic" style:font-weight-complex="bold"/>
    </style:style>
    <style:style style:name="T99" style:family="text">
      <style:text-properties fo:language="en" fo:country="US" fo:font-weight="normal" officeooo:rsid="07cbba5a" fo:background-color="transparent" loext:char-shading-value="0" style:font-weight-asian="normal" style:font-weight-complex="normal"/>
    </style:style>
    <style:style style:name="T100" style:family="text">
      <style:text-properties fo:language="en" fo:country="US" fo:font-weight="normal" officeooo:rsid="07d3c24a" fo:background-color="transparent" loext:char-shading-value="0" style:font-weight-asian="normal" style:font-weight-complex="normal"/>
    </style:style>
    <style:style style:name="T101" style:family="text">
      <style:text-properties fo:language="en" fo:country="US" fo:font-weight="normal" officeooo:rsid="07ce125d" fo:background-color="transparent" loext:char-shading-value="0" style:font-weight-asian="normal" style:font-weight-complex="normal"/>
    </style:style>
    <style:style style:name="T102" style:family="text">
      <style:text-properties fo:font-style="normal" fo:font-weight="bold" officeooo:rsid="007d3450" fo:background-color="#fff200" loext:char-shading-value="0" style:font-style-asian="normal" style:font-weight-asian="bold" style:font-style-complex="normal" style:font-weight-complex="bold"/>
    </style:style>
    <style:style style:name="T103" style:family="text">
      <style:text-properties fo:language="en" fo:country="US" fo:font-weight="normal" officeooo:rsid="07bf715c" fo:background-color="transparent" loext:char-shading-value="0" style:font-weight-asian="normal" style:font-weight-complex="normal"/>
    </style:style>
    <style:style style:name="T104" style:family="text">
      <style:text-properties fo:language="en" fo:country="US" fo:font-weight="bold" officeooo:rsid="07ce125d" fo:background-color="transparent" loext:char-shading-value="0" style:font-weight-asian="bold" style:font-weight-complex="bold"/>
    </style:style>
    <style:style style:name="T105" style:family="text">
      <style:text-properties fo:language="en" fo:country="US" fo:font-weight="normal" officeooo:rsid="07cf8692" fo:background-color="transparent" loext:char-shading-value="0" style:font-weight-asian="normal" style:font-weight-complex="normal"/>
    </style:style>
    <style:style style:name="T106" style:family="text">
      <style:text-properties fo:language="en" fo:country="US" fo:font-weight="bold" officeooo:rsid="07d3c24a" fo:background-color="transparent" loext:char-shading-value="0" style:font-weight-asian="bold" style:font-weight-complex="bold"/>
    </style:style>
    <style:style style:name="T107" style:family="text">
      <style:text-properties fo:language="en" fo:country="US" fo:font-weight="bold" officeooo:rsid="07cf8692" fo:background-color="transparent" loext:char-shading-value="0" style:font-weight-asian="bold" style:font-weight-complex="bold"/>
    </style:style>
    <style:style style:name="T108" style:family="text">
      <style:text-properties fo:language="en" fo:country="US" fo:font-weight="bold" officeooo:rsid="07b8eee3" fo:background-color="#dddddd" loext:char-shading-value="0" style:font-weight-asian="bold" style:font-weight-complex="bold"/>
    </style:style>
    <style:style style:name="T109" style:family="text">
      <style:text-properties fo:language="en" fo:country="US" fo:font-weight="normal" officeooo:rsid="07d03882" fo:background-color="transparent" loext:char-shading-value="0" style:font-weight-asian="normal" style:font-weight-complex="normal"/>
    </style:style>
    <style:style style:name="T110" style:family="text">
      <style:text-properties fo:language="en" fo:country="US" fo:font-weight="bold" officeooo:rsid="07d03882" fo:background-color="transparent" loext:char-shading-value="0" style:font-weight-asian="bold" style:font-weight-complex="bold"/>
    </style:style>
    <style:style style:name="T111" style:family="text">
      <style:text-properties fo:language="en" fo:country="US" fo:font-weight="normal" officeooo:rsid="07dfc476" fo:background-color="#dddddd" loext:char-shading-value="0" style:font-weight-asian="normal" style:font-weight-complex="normal"/>
    </style:style>
    <style:style style:name="T112" style:family="text">
      <style:text-properties fo:language="en" fo:country="US" fo:font-style="italic" fo:font-weight="bold" officeooo:rsid="07d03882" fo:background-color="transparent" loext:char-shading-value="0" style:font-style-asian="italic" style:font-weight-asian="bold" style:font-style-complex="italic" style:font-weight-complex="bold"/>
    </style:style>
    <style:style style:name="T113" style:family="text">
      <style:text-properties fo:language="en" fo:country="US" fo:font-weight="normal" officeooo:rsid="07e184c4" fo:background-color="transparent" loext:char-shading-value="0" style:font-weight-asian="normal" style:font-weight-complex="normal"/>
    </style:style>
    <style:style style:name="T114" style:family="text">
      <style:text-properties fo:language="en" fo:country="US" fo:font-weight="normal" officeooo:rsid="07e2e405" fo:background-color="transparent" loext:char-shading-value="0" style:font-weight-asian="normal" style:font-weight-complex="normal"/>
    </style:style>
    <style:style style:name="T115" style:family="text">
      <style:text-properties fo:language="en" fo:country="US" fo:font-weight="normal" officeooo:rsid="07e0d697" fo:background-color="transparent" loext:char-shading-value="0" style:font-weight-asian="normal" style:font-weight-complex="normal"/>
    </style:style>
    <style:style style:name="T116" style:family="text">
      <style:text-properties fo:language="en" fo:country="US" fo:font-weight="normal" officeooo:rsid="07d538ba" fo:background-color="transparent" loext:char-shading-value="0" style:font-weight-asian="normal" style:font-weight-complex="normal"/>
    </style:style>
    <style:style style:name="T117" style:family="text">
      <style:text-properties fo:language="en" fo:country="US" fo:font-style="italic" fo:font-weight="bold" officeooo:rsid="07d538ba" fo:background-color="transparent" loext:char-shading-value="0" style:font-style-asian="italic" style:font-weight-asian="bold" style:font-style-complex="italic" style:font-weight-complex="bold"/>
    </style:style>
    <style:style style:name="T118" style:family="text">
      <style:text-properties fo:language="en" fo:country="US" fo:font-weight="bold" officeooo:rsid="07d538ba" fo:background-color="transparent" loext:char-shading-value="0" style:font-weight-asian="bold" style:font-weight-complex="bold"/>
    </style:style>
    <style:style style:name="T119" style:family="text">
      <style:text-properties fo:language="en" fo:country="US" fo:font-weight="normal" officeooo:rsid="07e5f661" fo:background-color="transparent" loext:char-shading-value="0" style:font-weight-asian="normal" style:font-weight-complex="normal"/>
    </style:style>
    <style:style style:name="T120" style:family="text">
      <style:text-properties fo:language="en" fo:country="US" fo:font-weight="normal" officeooo:rsid="07d5f21e" fo:background-color="transparent" loext:char-shading-value="0" style:font-weight-asian="normal" style:font-weight-complex="normal"/>
    </style:style>
    <style:style style:name="T121" style:family="text">
      <style:text-properties fo:color="#999999" loext:opacity="100%" fo:language="en" fo:country="US" fo:font-weight="bold" officeooo:rsid="07bf715c" style:font-weight-asian="bold" style:font-weight-complex="bold"/>
    </style:style>
    <style:style style:name="T122" style:family="text">
      <style:text-properties fo:language="en" fo:country="US" fo:font-style="italic" fo:font-weight="bold" officeooo:rsid="07d3c24a" fo:background-color="#dddddd" loext:char-shading-value="0" style:font-style-asian="italic" style:font-weight-asian="bold" style:font-style-complex="italic" style:font-weight-complex="bold"/>
    </style:style>
    <style:style style:name="T123" style:family="text">
      <style:text-properties fo:language="en" fo:country="US" fo:font-style="normal" fo:font-weight="normal" officeooo:rsid="07bf715c" fo:background-color="transparent" loext:char-shading-value="0" style:font-style-asian="normal" style:font-weight-asian="normal" style:font-style-complex="normal" style:font-weight-complex="normal"/>
    </style:style>
    <style:style style:name="T124" style:family="text">
      <style:text-properties fo:language="en" fo:country="US" fo:font-style="normal" fo:font-weight="normal" officeooo:rsid="07d7ba8c" fo:background-color="transparent" loext:char-shading-value="0" style:font-style-asian="normal" style:font-weight-asian="normal" style:font-style-complex="normal" style:font-weight-complex="normal"/>
    </style:style>
    <style:style style:name="T125" style:family="text">
      <style:text-properties fo:language="en" fo:country="US" fo:font-style="normal" fo:font-weight="bold" officeooo:rsid="07bf715c" fo:background-color="transparent" loext:char-shading-value="0" style:font-style-asian="normal" style:font-weight-asian="bold" style:font-style-complex="normal" style:font-weight-complex="bold"/>
    </style:style>
    <style:style style:name="T126" style:family="text">
      <style:text-properties fo:language="en" fo:country="US" fo:font-style="italic" fo:font-weight="bold" officeooo:rsid="07bf715c" fo:background-color="transparent" loext:char-shading-value="0" style:font-style-asian="italic" style:font-weight-asian="bold" style:font-style-complex="italic" style:font-weight-complex="bold"/>
    </style:style>
    <style:style style:name="T127" style:family="text">
      <style:text-properties fo:language="en" fo:country="US" fo:font-style="normal" fo:font-weight="normal" officeooo:rsid="07d8cd16" fo:background-color="transparent" loext:char-shading-value="0" style:font-style-asian="normal" style:font-weight-asian="normal" style:font-style-complex="normal" style:font-weight-complex="normal"/>
    </style:style>
    <style:style style:name="T128" style:family="text">
      <style:text-properties fo:language="en" fo:country="US" fo:font-style="normal" fo:font-weight="normal" officeooo:rsid="07da694d" fo:background-color="transparent" loext:char-shading-value="0" style:font-style-asian="normal" style:font-weight-asian="normal" style:font-style-complex="normal" style:font-weight-complex="normal"/>
    </style:style>
    <style:style style:name="T129" style:family="text">
      <style:text-properties fo:language="en" fo:country="US" fo:font-style="normal" fo:font-weight="bold" officeooo:rsid="07da694d" fo:background-color="transparent" loext:char-shading-value="0" style:font-style-asian="normal" style:font-weight-asian="bold" style:font-style-complex="normal" style:font-weight-complex="bold"/>
    </style:style>
    <style:style style:name="T130" style:family="text">
      <style:text-properties fo:language="en" fo:country="US" fo:font-style="normal" fo:font-weight="normal" officeooo:rsid="07db5bec" fo:background-color="transparent" loext:char-shading-value="0" style:font-style-asian="normal" style:font-weight-asian="normal" style:font-style-complex="normal" style:font-weight-complex="normal"/>
    </style:style>
    <style:style style:name="T131" style:family="text">
      <style:text-properties fo:language="en" fo:country="US" fo:font-style="normal" fo:font-weight="bold" officeooo:rsid="07db5bec" fo:background-color="transparent" loext:char-shading-value="0" style:font-style-asian="normal" style:font-weight-asian="bold" style:font-style-complex="normal" style:font-weight-complex="bold"/>
    </style:style>
    <style:style style:name="T132" style:family="text">
      <style:text-properties fo:language="en" fo:country="US" fo:font-style="normal" fo:font-weight="bold" officeooo:rsid="07e5f661" fo:background-color="transparent" loext:char-shading-value="0" style:font-style-asian="normal" style:font-weight-asian="bold" style:font-style-complex="normal" style:font-weight-complex="bold"/>
    </style:style>
    <style:style style:name="T133" style:family="text">
      <style:text-properties fo:language="en" fo:country="US" fo:font-style="normal" fo:font-weight="normal" officeooo:rsid="07e5f661" fo:background-color="transparent" loext:char-shading-value="0" style:font-style-asian="normal" style:font-weight-asian="normal" style:font-style-complex="normal" style:font-weight-complex="normal"/>
    </style:style>
    <style:style style:name="T134" style:family="text">
      <style:text-properties fo:language="en" fo:country="US" fo:font-style="normal" fo:font-weight="normal" officeooo:rsid="07dc94bb" fo:background-color="transparent" loext:char-shading-value="0" style:font-style-asian="normal" style:font-weight-asian="normal" style:font-style-complex="normal" style:font-weight-complex="normal"/>
    </style:style>
    <style:style style:name="T135" style:family="text">
      <style:text-properties fo:language="en" fo:country="US" fo:font-style="normal" fo:font-weight="normal" officeooo:rsid="07e3dd28" fo:background-color="transparent" loext:char-shading-value="0" style:font-style-asian="normal" style:font-weight-asian="normal" style:font-style-complex="normal" style:font-weight-complex="normal"/>
    </style:style>
    <style:style style:name="T136" style:family="text">
      <style:text-properties fo:language="en" fo:country="US" fo:font-style="italic" fo:font-weight="bold" officeooo:rsid="07dc94bb" fo:background-color="transparent" loext:char-shading-value="0" style:font-style-asian="italic" style:font-weight-asian="bold" style:font-style-complex="italic" style:font-weight-complex="bold"/>
    </style:style>
    <style:style style:name="T137" style:family="text">
      <style:text-properties fo:language="en" fo:country="US" fo:font-style="normal" fo:font-weight="bold" officeooo:rsid="07dc94bb" fo:background-color="transparent" loext:char-shading-value="0" style:font-style-asian="normal" style:font-weight-asian="bold" style:font-style-complex="normal" style:font-weight-complex="bold"/>
    </style:style>
    <style:style style:name="T138" style:family="text">
      <style:text-properties fo:language="en" fo:country="US" officeooo:rsid="00704232"/>
    </style:style>
    <style:style style:name="T139" style:family="text">
      <style:text-properties fo:language="en" fo:country="US" fo:font-weight="bold" officeooo:rsid="008ceef7" style:font-weight-asian="bold" style:font-weight-complex="bold"/>
    </style:style>
    <style:style style:name="T140" style:family="text">
      <style:text-properties fo:language="en" fo:country="US" fo:font-weight="bold" officeooo:rsid="010b0b47" style:font-weight-asian="bold" style:font-weight-complex="bold"/>
    </style:style>
    <style:style style:name="T141" style:family="text">
      <style:text-properties fo:language="en" fo:country="US" officeooo:rsid="00bb70dd"/>
    </style:style>
    <style:style style:name="T142" style:family="text">
      <style:text-properties fo:language="en" fo:country="US" fo:font-weight="bold" officeooo:rsid="00704232" style:font-weight-asian="bold" style:font-weight-complex="bold"/>
    </style:style>
    <style:style style:name="T143" style:family="text">
      <style:text-properties fo:language="en" fo:country="US" fo:font-weight="normal" officeooo:rsid="00bb70dd" fo:background-color="transparent" loext:char-shading-value="0" style:font-weight-asian="normal" style:font-weight-complex="normal"/>
    </style:style>
    <style:style style:name="T144" style:family="text">
      <style:text-properties fo:language="en" fo:country="US" fo:font-weight="normal" officeooo:rsid="00704232" fo:background-color="transparent" loext:char-shading-value="0" style:font-weight-asian="normal" style:font-weight-complex="normal"/>
    </style:style>
    <style:style style:name="T145" style:family="text">
      <style:text-properties fo:language="en" fo:country="US" fo:font-weight="bold" officeooo:rsid="07bf715c" fo:background-color="#fff200" loext:char-shading-value="0" style:font-weight-asian="bold" style:font-weight-complex="bold"/>
    </style:style>
    <style:style style:name="T146" style:family="text">
      <style:text-properties fo:language="en" fo:country="US" fo:font-weight="bold" officeooo:rsid="00704232" fo:background-color="#fff200" loext:char-shading-value="0" style:font-weight-asian="bold" style:font-weight-complex="bold"/>
    </style:style>
    <style:style style:name="T147" style:family="text">
      <style:text-properties fo:language="en" fo:country="US" fo:font-weight="bold" officeooo:rsid="00fb0d24" fo:background-color="#fff200" loext:char-shading-value="0" style:font-weight-asian="bold" style:font-weight-complex="bold"/>
    </style:style>
    <style:style style:name="T148" style:family="text">
      <style:text-properties fo:language="en" fo:country="US" fo:font-weight="bold" officeooo:rsid="007f05cd" fo:background-color="#fff200" loext:char-shading-value="0" style:font-weight-asian="bold" style:font-weight-complex="bold"/>
    </style:style>
    <style:style style:name="T149" style:family="text">
      <style:text-properties officeooo:rsid="06ae9e0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Intro</text:span> ###</text:p>
      <text:p text:style-name="P2"/>
      <text:p text:style-name="P3"><text:span text:style-name="T2">Here are some </text:span><text:span text:style-name="T3">Java </text:span><text:span text:style-name="T4">IDE</text:span><text:span text:style-name="T5"> </text:span><text:span text:style-name="T6">improvements </text:span><text:span text:style-name="T7">of </text:span><text:span text:style-name="T8">Eclipse </text:span><text:span text:style-name="T9">202</text:span><text:span text:style-name="T10">6</text:span><text:span text:style-name="T9">-</text:span><text:span text:style-name="T10">03</text:span><text:span text:style-name="T11"> </text:span><text:span text:style-name="T12">including</text:span><text:span text:style-name="T11"> </text:span><text:span text:style-name="T13">Git and</text:span><text:span text:style-name="T11"> general improvements, </text:span><text:span text:style-name="T14">improvements </text:span><text:span text:style-name="T12">that have been added </text:span><text:span text:style-name="T15">since the last release in </text:span><text:span text:style-name="T16">December</text:span><text:span text:style-name="T15"> </text:span><text:span text:style-name="T12">three months </text:span><text:span text:style-name="T17">ago</text:span><text:span text:style-name="T18">.</text:span></text:p>
      <text:p text:style-name="P4"/>
      <text:p text:style-name="P5"/>
      <text:p text:style-name="P6"><text:span text:style-name="T19">### </text:span><text:span text:style-name="T20">J</text:span><text:span text:style-name="T21">ava </text:span><text:span text:style-name="T22">2</text:span><text:span text:style-name="T23">6</text:span><text:span text:style-name="T24"> </text:span><text:span text:style-name="T19">###</text:span></text:p>
      <text:p text:style-name="P7"/>
      <text:p text:style-name="P8"><text:span text:style-name="T25">S</text:span><text:span text:style-name="T26">upport </text:span><text:span text:style-name="T25">for </text:span><text:span text:style-name="T27">the upcoming</text:span><text:span text:style-name="T26"> </text:span><text:span text:style-name="T28">Java 2</text:span><text:span text:style-name="T29">6</text:span><text:span text:style-name="T25">, </text:span><text:span text:style-name="T30">which</text:span><text:span text:style-name="T31"> is due to be released</text:span><text:span text:style-name="T30"> </text:span><text:span text:style-name="T32">one</text:span><text:span text:style-name="T33"> </text:span><text:span text:style-name="T34">week</text:span><text:span text:style-name="T35"> after </text:span><text:span text:style-name="T36">this E</text:span><text:span text:style-name="T37">clipse </text:span><text:span text:style-name="T36">release</text:span><text:span text:style-name="T37">,</text:span><text:span text:style-name="T25"> is</text:span> <text:span text:style-name="T38">not yet</text:span> <text:span text:style-name="T39">built-in</text:span>, b<text:span text:style-name="T25">ut the preview will be available </text:span><text:span text:style-name="T40">soon </text:span><text:span text:style-name="T41">for</text:span><text:span text:style-name="T25"> install</text:span><text:span text:style-name="T41">ing</text:span><text:span text:style-name="T25"> </text:span><text:span text:style-name="T42">via</text:span> the <text:span text:style-name="T38">Eclipse Marketplace</text:span><text:span text:style-name="T42">.</text:span></text:p>
      <text:p text:style-name="P8"/>
      <text:p text:style-name="P8"/>
      <text:p text:style-name="P6"><text:span text:style-name="T19">### </text:span><text:span text:style-name="T20">J</text:span><text:span text:style-name="T21">ava </text:span><text:span text:style-name="T19">###</text:span></text:p>
      <text:p text:style-name="P9"/>
      <text:p text:style-name="P10"><text:span text:style-name="T12">In the Java editor,</text:span><text:span text:style-name="T43"> a new </text:span><text:span text:style-name="T44">Convert Class to Record</text:span><text:span text:style-name="T43"> </text:span><text:span text:style-name="T45">refactor</text:span><text:span text:style-name="T46">ing</text:span><text:span text:style-name="T45"> function</text:span><text:span text:style-name="T43"> has been introduced for </text:span><text:span text:style-name="T47">simple </text:span><text:span text:style-name="T43">immutable </text:span><text:span text:style-name="T48">data</text:span><text:span text:style-name="T43"> </text:span><text:span text:style-name="T45">classes</text:span><text:span text:style-name="T49">,</text:span><text:span text:style-name="T50"> </text:span><text:span text:style-name="T51">containing</text:span><text:span text:style-name="T48"> </text:span><text:span text:style-name="T52">one constructor</text:span><text:span text:style-name="T53">,</text:span><text:span text:style-name="T54"> </text:span><text:span text:style-name="T55">[…</text:span><text:span text:style-name="T56">] </text:span><text:span text:style-name="T43">only </text:span><text:span text:style-name="T57">private </text:span><text:span text:style-name="T45">fields</text:span><text:span text:style-name="T43"> </text:span><text:span text:style-name="T55">[…</text:span><text:span text:style-name="T56">]</text:span><text:span text:style-name="T58"> </text:span><text:span text:style-name="T43">and </text:span><text:span text:style-name="T45">getter</text:span><text:span text:style-name="T49">,</text:span><text:span text:style-name="T59"> </text:span><text:span text:style-name="T51">but </text:span><text:span text:style-name="T59">no setter or other</text:span><text:span text:style-name="T49"> </text:span><text:span text:style-name="T45">methods</text:span><text:span text:style-name="T54">: Select the class </text:span><text:span text:style-name="T55">[…</text:span><text:span text:style-name="T56">] </text:span><text:span text:style-name="T54">and in the </text:span><text:span text:style-name="T46">main menu</text:span><text:span text:style-name="T54"> </text:span><text:span text:style-name="T55">[…</text:span><text:span text:style-name="T56">] </text:span><text:span text:style-name="T54">or in the </text:span><text:span text:style-name="T46">right-click menu</text:span><text:span text:style-name="T54"> choose </text:span><text:span text:style-name="T60">Refactor</text:span><text:span text:style-name="T43"> </text:span><text:span text:style-name="T55">[…</text:span><text:span text:style-name="T56">]</text:span><text:span text:style-name="T49"> </text:span><text:span text:style-name="T60">Convert Class to Record</text:span><text:span text:style-name="T43">.</text:span><text:span text:style-name="T54"> </text:span><text:span text:style-name="T55">[…</text:span><text:span text:style-name="T56">]</text:span><text:span text:style-name="T43"> </text:span><text:span text:style-name="T54">In the </text:span><text:span text:style-name="T60">preview</text:span><text:span text:style-name="T54">, you can see that the </text:span><text:span text:style-name="T61">getter</text:span><text:span text:style-name="T54"> method </text:span><text:span text:style-name="T53">calls</text:span><text:span text:style-name="T54"> will be adapted </text:span><text:span text:style-name="T53">accordingl</text:span><text:span text:style-name="T54">y. </text:span><text:span text:style-name="T62">Nice, isn’t</text:span><text:span text:style-name="T12"> it?</text:span></text:p>
      <text:p text:style-name="P11"/>
      <text:p text:style-name="P12"><text:span text:style-name="T54">This </text:span><text:span text:style-name="T53">new </text:span><text:span text:style-name="T54">refactoring is</text:span><text:span text:style-name="T63"> also provided </text:span><text:span text:style-name="T46">as</text:span><text:span text:style-name="T38"> quick assist</text:span><text:span text:style-name="T64"> </text:span><text:span text:style-name="T65">(</text:span><text:span text:style-name="T66">Ctrl+1</text:span><text:span text:style-name="T65">)</text:span><text:span text:style-name="T64">, if </text:span><text:span text:style-name="T67">and only if </text:span><text:span text:style-name="T64">the refactoring dialog d</text:span><text:span text:style-name="T68">oes</text:span><text:span text:style-name="T64"> not </text:span><text:span text:style-name="T67">show</text:span><text:span text:style-name="T64"> any warnings. </text:span><text:span text:style-name="T62">For example,</text:span><text:span text:style-name="T64"> </text:span><text:span text:style-name="T69">a</text:span><text:span text:style-name="T38">ll fields</text:span><text:span text:style-name="T64"> must be exposed via </text:span><text:span text:style-name="T38">getter</text:span><text:span text:style-name="T64"> methods, since they are also exposed in a record. </text:span><text:span text:style-name="T55">[…</text:span><text:span text:style-name="T56">]</text:span> <text:span text:style-name="T70">Go to the class, </text:span><text:span text:style-name="T55">[…</text:span><text:span text:style-name="T56">] </text:span><text:span text:style-name="T70">hit Ctrl+1 </text:span><text:span text:style-name="T55">[…</text:span><text:span text:style-name="T56">] </text:span><text:span text:style-name="T70">and choose </text:span><text:span text:style-name="T44">Convert to Record</text:span><text:span text:style-name="T70">. </text:span><text:span text:style-name="T12">Voilà, </text:span><text:span text:style-name="T71">the class has been converted.</text:span></text:p>
      <text:p text:style-name="P11"/>
      <text:p text:style-name="P13">Another new <text:span text:style-name="T38">quick assist</text:span><text:span text:style-name="T64"> </text:span>is offered at <text:span text:style-name="T38">JUnit tests to disable or </text:span><text:span text:style-name="T72">to </text:span><text:span text:style-name="T38">re-enable</text:span> them: <text:span text:style-name="T73">Go to the test method, </text:span><text:span text:style-name="T55">[…</text:span><text:span text:style-name="T56">] </text:span><text:span text:style-name="T73">hit Ctrl+1 </text:span><text:span text:style-name="T55">[…</text:span><text:span text:style-name="T56">] </text:span><text:span text:style-name="T73">and choose </text:span><text:span text:style-name="T74">“</text:span><text:span text:style-name="T75">Disable test</text:span><text:span text:style-name="T76">”</text:span><text:span text:style-name="T77">. </text:span><text:span text:style-name="T55">[…</text:span><text:span text:style-name="T56">]</text:span><text:span text:style-name="T77"> To re-enable it, hit </text:span><text:span text:style-name="T78">Ctrl+1</text:span><text:span text:style-name="T77"> again </text:span><text:span text:style-name="T55">[…</text:span><text:span text:style-name="T56">]</text:span><text:span text:style-name="T77"> and choose </text:span><text:span text:style-name="T76">“</text:span><text:span text:style-name="T79">Enable test</text:span><text:span text:style-name="T80">”</text:span>.</text:p>
      <text:p text:style-name="P11"/>
      <text:p text:style-name="P14">The annotation-based null analysis has been improved for fields: When <text:span text:style-name="T81">for the project </text:span><text:span text:style-name="T55">[…</text:span><text:span text:style-name="T56">]</text:span><text:span text:style-name="T81"> the compiler </text:span><text:span text:style-name="T55">[…</text:span><text:span text:style-name="T56">]</text:span><text:span text:style-name="T81"> warnings </text:span><text:span text:style-name="T55">[…</text:span><text:span text:style-name="T56">]</text:span> “<text:span text:style-name="T79">annotation-based null analysis</text:span><text:span text:style-name="T82">”</text:span> <text:span text:style-name="T55">[…</text:span><text:span text:style-name="T56">]</text:span> and <text:span text:style-name="T82">“</text:span><text:span text:style-name="T79">syntactic null analysis for fields</text:span><text:span text:style-name="T82">”</text:span> <text:span text:style-name="T83">are enabled</text:span>, <text:span text:style-name="T55">[…</text:span><text:span text:style-name="T56">]</text:span> a „Potential null pointer access“ warning is no longer falsely displayed after code that ensures that the field cannot be null. Please note, that this only works if no method is called in between, as the method can <text:span text:style-name="T84">set the field to </text:span><text:span text:style-name="T85">null</text:span><text:span text:style-name="T84">, but cannot set a parameter to </text:span><text:span text:style-name="T85">null</text:span>.</text:p>
      <text:p text:style-name="P15"/>
      <text:p text:style-name="P16">There are two minor improvements <text:span text:style-name="T40">in order </text:span>to ease debugging.</text:p>
      <text:p text:style-name="P17"/>
      <text:p text:style-name="P18"><text:span text:style-name="T62">First:</text:span> When the debugger <text:span text:style-name="T38">pauses</text:span> at a <text:span text:style-name="T79">lambda entry breakpoint</text:span> within an <text:span text:style-name="T38">inline</text:span> lambda expression, the <text:span text:style-name="T38">lambda expression</text:span> will be <text:span text:style-name="T38">selected</text:span>, <text:span text:style-name="T62">rather than the entire line being highlighted </text:span><text:span text:style-name="T86">as in the past</text:span><text:span text:style-name="T62">.</text:span> <text:span text:style-name="T86">Thus, if there </text:span><text:span text:style-name="T87">are </text:span><text:span text:style-name="T86">multiple chained lambdas in a line, you can </text:span><text:span text:style-name="T87">now </text:span><text:span text:style-name="T86">see at which one it is being paused.</text:span> <text:span text:style-name="T86">Nice, isn’t it?</text:span></text:p>
      <text:p text:style-name="P19"/>
      <text:p text:style-name="P20"><text:span text:style-name="T62">Second:</text:span><text:span text:style-name="T88"> You can now </text:span><text:span text:style-name="T89">drag and drop</text:span><text:span text:style-name="T88"> </text:span><text:span text:style-name="T89">variables</text:span><text:span text:style-name="T88"> from the </text:span><text:span text:style-name="T90">Variables</text:span><text:span text:style-name="T88"> view </text:span><text:span text:style-name="T89">into</text:span><text:span text:style-name="T88"> the </text:span><text:span text:style-name="T91">Debug Shell</text:span><text:span text:style-name="T88"> </text:span><text:span text:style-name="T55">[…</text:span><text:span text:style-name="T56">] </text:span><text:span text:style-name="T92">as well as</text:span><text:span text:style-name="T88"> </text:span><text:span text:style-name="T89">expressions</text:span><text:span text:style-name="T88"> from the </text:span><text:span text:style-name="T90">Expressions</text:span><text:span text:style-name="T88"> view into the </text:span><text:span text:style-name="T90">Debug Shell</text:span><text:span text:style-name="T88">.</text:span></text:p>
      <text:p text:style-name="P21"/>
      <text:p text:style-name="P22"/>
      <text:p text:style-name="P23"><text:span text:style-name="T93">### </text:span><text:span text:style-name="T94">General</text:span><text:span text:style-name="T95"> </text:span><text:span text:style-name="T93">###</text:span></text:p>
      <text:p text:style-name="P24"/>
      <text:p text:style-name="P25">In addition to the<text:span text:style-name="T96">se</text:span> Java tooling improvements, there are new and noteworthy general enhancements to the Eclipse IDE platform.</text:p>
      <text:p text:style-name="P26"/>
      <text:p text:style-name="P27"><text:span text:style-name="T97">For</text:span><text:span text:style-name="T62"> the </text:span><text:span text:style-name="T98">Generic Code Editor</text:span><text:span text:style-name="T62"> with TextMate syntax highlighting,</text:span><text:span text:style-name="T99"> </text:span><text:span text:style-name="T100">y</text:span><text:span text:style-name="T99">ou can </text:span><text:span text:style-name="T100">now </text:span><text:span text:style-name="T99">define your own</text:span><text:span text:style-name="T101"> </text:span><text:span text:style-name="T102">templates</text:span><text:span text:style-name="T99"> in the preferences </text:span><text:span text:style-name="T55">[…</text:span><text:span text:style-name="T56">]</text:span><text:span text:style-name="T99"> </text:span><text:span text:style-name="T103">TextMate </text:span><text:span text:style-name="T55">[…</text:span><text:span text:style-name="T56">]</text:span><text:span text:style-name="T103"> Templates. </text:span><text:span text:style-name="T55">[…</text:span><text:span text:style-name="T56">]</text:span><text:span text:style-name="T103"> </text:span><text:span text:style-name="T100">C</text:span><text:span text:style-name="T101">lick </text:span><text:span text:style-name="T104">New</text:span><text:span text:style-name="T101"> </text:span><text:span text:style-name="T55">[…</text:span><text:span text:style-name="T56">]</text:span><text:span text:style-name="T101"> </text:span><text:span text:style-name="T105">enter a </text:span><text:span text:style-name="T106">n</text:span><text:span text:style-name="T107">ame</text:span><text:span text:style-name="T105"> </text:span><text:span text:style-name="T55">[…</text:span><text:span text:style-name="T56">]</text:span><text:span text:style-name="T105"> choose a </text:span><text:span text:style-name="T107">context</text:span><text:span text:style-name="T105">, </text:span><text:span text:style-name="T62">for example </text:span><text:span text:style-name="T108">HTML</text:span><text:span text:style-name="T109"> </text:span><text:span text:style-name="T55">[…</text:span><text:span text:style-name="T56">]</text:span><text:span text:style-name="T109"> enter a </text:span><text:span text:style-name="T110">description</text:span><text:span text:style-name="T109"> </text:span><text:span text:style-name="T55">[…</text:span><text:span text:style-name="T56">]</text:span><text:span text:style-name="T109"> and the </text:span><text:span text:style-name="T110">template</text:span><text:span text:style-name="T109">.</text:span><text:span text:style-name="T105"> </text:span><text:span text:style-name="T55">[…</text:span><text:span text:style-name="T56">]</text:span><text:span text:style-name="T105"> </text:span><text:span text:style-name="T109">You can also use </text:span><text:span text:style-name="T110">variables</text:span><text:span text:style-name="T109">, </text:span><text:span text:style-name="T62">for example, </text:span><text:span text:style-name="T111">in order</text:span><text:span text:style-name="T62"> to </text:span><text:span text:style-name="T97">specify where the</text:span><text:span text:style-name="T62"> </text:span><text:span text:style-name="T108">cursor</text:span><text:span text:style-name="T62"> </text:span><text:span text:style-name="T97">should be placed</text:span><text:span text:style-name="T62">.</text:span><text:span text:style-name="T109"> </text:span><text:span text:style-name="T55">[…</text:span><text:span text:style-name="T56">]</text:span><text:span text:style-name="T109"> Hit “</text:span><text:span text:style-name="T112">OK and Apply</text:span><text:span text:style-name="T109">” and </text:span><text:span text:style-name="T112">Close</text:span><text:span text:style-name="T109">. </text:span><text:span text:style-name="T55">[…</text:span><text:span text:style-name="T56">]</text:span><text:span text:style-name="T109"> </text:span><text:span text:style-name="T62">With that,</text:span><text:span text:style-name="T109"> </text:span><text:span text:style-name="T100">you</text:span><text:span text:style-name="T109"> </text:span><text:span text:style-name="T100">can </text:span><text:span text:style-name="T113">ins</text:span><text:span text:style-name="T114">ert</text:span><text:span text:style-name="T100"> your</text:span><text:span text:style-name="T109"> </text:span><text:span text:style-name="T115">custom </text:span><text:span text:style-name="T109">template via the content assi</text:span><text:span text:style-name="T100">s</text:span><text:span text:style-name="T109">t (</text:span><text:span text:style-name="T110">Ctrl+Space</text:span><text:span text:style-name="T109">).</text:span></text:p>
      <text:p text:style-name="P26"/>
      <text:p text:style-name="P28"><text:span text:style-name="T116">The </text:span><text:span text:style-name="T117">Console</text:span><text:span text:style-name="T118"> view icon</text:span><text:span text:style-name="T116"> </text:span><text:span text:style-name="T119">now </text:span><text:span text:style-name="T116">changes depending on the </text:span><text:span text:style-name="T118">currently selected console</text:span><text:span text:style-name="T116">. </text:span><text:span text:style-name="T97">This is particularly helpful when multiple console views are open.</text:span><text:span text:style-name="T116"> </text:span><text:span text:style-name="T120">You can</text:span><text:span text:style-name="T116"> disable this feature in the </text:span><text:span text:style-name="T118">preferences</text:span><text:span text:style-name="T116"> </text:span><text:span text:style-name="T55">[…</text:span><text:span text:style-name="T56">]</text:span><text:span text:style-name="T116"> </text:span><text:span text:style-name="T117">Run/Debug</text:span><text:span text:style-name="T116"> </text:span><text:span text:style-name="T55">[…</text:span><text:span text:style-name="T56">]</text:span><text:span text:style-name="T116"> </text:span><text:span text:style-name="T117">Console</text:span><text:span text:style-name="T116"> </text:span><text:span text:style-name="T55">[…</text:span><text:span text:style-name="T56">]</text:span><text:span text:style-name="T116"> by unchecking “</text:span><text:span text:style-name="T44">Update Console icon based on currently active page</text:span><text:span text:style-name="T116">”.</text:span></text:p>
      <text:p text:style-name="P29"/>
      <text:p text:style-name="P30"/>
      <text:p text:style-name="P23"><text:span text:style-name="T93">### </text:span><text:span text:style-name="T121">Git</text:span><text:span text:style-name="T95"> </text:span><text:span text:style-name="T93">###</text:span></text:p>
      <text:p text:style-name="P24"/>
      <text:p text:style-name="P31"><text:span text:style-name="T97">In the </text:span><text:span text:style-name="T122">Git Repositories</text:span><text:span text:style-name="T97"> view,</text:span><text:span text:style-name="T123"> </text:span><text:span text:style-name="T102">tags</text:span><text:span text:style-name="T123"> </text:span><text:span text:style-name="T124">are now listed in</text:span><text:span text:style-name="T123"> </text:span><text:span text:style-name="T102">descending</text:span><text:span text:style-name="T123"> instead of ascending order. </text:span><text:span text:style-name="T97">This is because tags are typically used for releases, with the latest releases usually being of greater interest. Therefore, it makes more sense to show them at the top rather than at the bottom of the list.</text:span><text:span text:style-name="T123"> Also, in the dialog that you get when you </text:span><text:span text:style-name="T125">right-click</text:span><text:span text:style-name="T124"> </text:span><text:span text:style-name="T55">[…</text:span><text:span text:style-name="T56">]</text:span><text:span text:style-name="T124"> and choose </text:span><text:span text:style-name="T126">Compare With</text:span><text:span text:style-name="T123"> </text:span><text:span text:style-name="T55">[…</text:span><text:span text:style-name="T56">]</text:span><text:span text:style-name="T123"> </text:span><text:span text:style-name="T126">Branch, Tag, or Reference</text:span><text:span text:style-name="T123">, </text:span><text:span text:style-name="T55">[…</text:span><text:span text:style-name="T56">]</text:span><text:span text:style-name="T123"> the tags are now </text:span><text:span text:style-name="T127">listed </text:span><text:span text:style-name="T123">in descending order.</text:span></text:p>
      <text:p text:style-name="P32"/>
      <text:p text:style-name="P33"><text:span text:style-name="T128">In the </text:span><text:span text:style-name="T126">Git Staging</text:span><text:span text:style-name="T123"> </text:span><text:span text:style-name="T125">view menu</text:span><text:span text:style-name="T123">, </text:span><text:span text:style-name="T128">you can toggle whether to </text:span><text:span text:style-name="T44">Reuse Compare Editor</text:span><text:span text:style-name="T123"> </text:span><text:span text:style-name="T128">or not, </text:span><text:span text:style-name="T97">just as you can in the </text:span><text:span text:style-name="T122">History</text:span><text:span text:style-name="T97"> view</text:span><text:span text:style-name="T128">. This is just a </text:span><text:span text:style-name="T129">shortcut</text:span><text:span text:style-name="T128"> for </text:span><text:span text:style-name="T125">preferences</text:span><text:span text:style-name="T123"> </text:span><text:span text:style-name="T55">[…</text:span><text:span text:style-name="T56">]</text:span><text:span text:style-name="T123"> </text:span><text:span text:style-name="T126">Version Control</text:span><text:span text:style-name="T123"> </text:span><text:span text:style-name="T55">[…</text:span><text:span text:style-name="T56">]</text:span><text:span text:style-name="T123"> </text:span><text:span text:style-name="T126">Reuse open compare editors when opening comparisons</text:span><text:span text:style-name="T123">. </text:span><text:span text:style-name="T130">When </text:span><text:span text:style-name="T131">disable</text:span><text:span text:style-name="T132">d</text:span><text:span text:style-name="T130">, each click on a file opens a </text:span><text:span text:style-name="T131">new compare editor</text:span><text:span text:style-name="T130"> </text:span><text:span text:style-name="T55">[…</text:span><text:span text:style-name="T56">]</text:span><text:span text:style-name="T130"> rather than reus</text:span><text:span text:style-name="T133">ing</text:span><text:span text:style-name="T130"> an existing compare editor.</text:span></text:p>
      <text:p text:style-name="P32"/>
      <text:p text:style-name="P34"><text:span text:style-name="T97">The results of a fetch operation is shown by default in a dialog.</text:span><text:span text:style-name="T130"> In the </text:span><text:span text:style-name="T125">preferences</text:span><text:span text:style-name="T123"> </text:span><text:span text:style-name="T55">[…</text:span><text:span text:style-name="T56">]</text:span><text:span text:style-name="T123"> </text:span><text:span text:style-name="T126">Version Control</text:span><text:span text:style-name="T123"> </text:span><text:span text:style-name="T55">[…</text:span><text:span text:style-name="T56">]</text:span><text:span text:style-name="T123"> </text:span><text:span text:style-name="T126">Git</text:span><text:span text:style-name="T123"> </text:span><text:span text:style-name="T55">[…</text:span><text:span text:style-name="T56">]</text:span><text:span text:style-name="T123"> </text:span><text:span text:style-name="T126">Confirmations and Warnings</text:span><text:span text:style-name="T123">, </text:span><text:span text:style-name="T134">y</text:span><text:span text:style-name="T123">ou can now choose to </text:span><text:span text:style-name="T134">show them only </text:span><text:span text:style-name="T123">as notifications instead, </text:span><text:span text:style-name="T135">by ticking the checkbox </text:span><text:span text:style-name="T44">Use notification instead of dialog for fetch result</text:span><text:span text:style-name="T134">. </text:span><text:span text:style-name="T55">[…</text:span><text:span text:style-name="T56">]</text:span><text:span text:style-name="T123"> The notification pops up in the bottom right corner.</text:span><text:span text:style-name="T134"> </text:span><text:span text:style-name="T55">[…</text:span><text:span text:style-name="T56">]</text:span><text:span text:style-name="T134"> Click </text:span><text:span text:style-name="T136">Details</text:span><text:span text:style-name="T134"> to get the full </text:span><text:span text:style-name="T136">Fetch Results</text:span><text:span text:style-name="T137"> dialog</text:span><text:span text:style-name="T134">.</text:span></text:p>
      <text:p text:style-name="P32"/>
      <text:p text:style-name="P35"/>
      <text:p text:style-name="P36">### Outro ###</text:p>
      <text:p text:style-name="P37"/>
      <text:p text:style-name="P38"><text:span text:style-name="T138">These were some of the </text:span><text:span text:style-name="T139">Java </text:span><text:span text:style-name="T140">IDE</text:span><text:span text:style-name="T138"> improvements </text:span><text:span text:style-name="T141">of the </text:span><text:span text:style-name="T142">quarterly </text:span><text:span text:style-name="T143">Rolling</text:span><text:span text:style-name="T144"> Release </text:span><text:span text:style-name="T145">March</text:span><text:span text:style-name="T146"> 202</text:span><text:span text:style-name="T145">6</text:span><text:span text:style-name="T138">.</text:span></text:p>
      <text:p text:style-name="P39"/>
      <text:p text:style-name="P40"><text:span text:style-name="T147">Thank</text:span><text:span text:style-name="T148">s</text:span><text:span text:style-name="T147"> for watching and happy coding!</text:span></text:p>
      <text:p text:style-name="P41">___</text:p>
      <text:p text:style-name="P42">Pronunciations:</text:p>
      <text:list text:style-name="L1">
        <text:list-item>
          <text:p text:style-name="P43">Git <text:tab/>/ɡɪt/</text:p>
        </text:list-item>
        <text:list-item>
          <text:p text:style-name="P43">YAML <text:tab/>/ˈjæməl/</text:p>
        </text:list-item>
        <text:list-item>
          <text:p text:style-name="P43">Vue.js <text:tab/>"view" J S</text:p>
        </text:list-item>
        <text:list-item>
          <text:p text:style-name="P43">RISC-V "<text:span text:style-name="T149">risc-fiv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tandard_20__28_WW_29_" style:display-name="Standard (WW)" style:family="paragraph">
      <style:paragraph-properties fo:margin-top="0.176cm" fo:margin-bottom="0.176cm" style:contextual-spacing="false"/>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Internet_20_Link" style:display-name="Internet Link" style:family="tex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14T08:46:58.207000000</meta:creation-date>
    <dc:date>2026-03-09T16:22:29.010185500</dc:date>
    <meta:editing-duration>P8DT6H15M</meta:editing-duration>
    <meta:editing-cycles>1148</meta:editing-cycles>
    <meta:generator>LibreOffice/26.2.0.3$Windows_X86_64 LibreOffice_project/620$Build-3</meta:generator>
    <meta:document-statistic meta:table-count="0" meta:image-count="0" meta:object-count="0" meta:page-count="1" meta:paragraph-count="29" meta:word-count="832" meta:character-count="4818" meta:non-whitespace-character-count="4016"/>
    <meta:user-defined meta:name="DocumentEncoding">utf-8</meta:user-defined>
    <meta:user-defined meta:name="HTML" meta:value-type="boolean">true</meta:user-defined>
  </office:meta>
</office:document-meta>
</file>