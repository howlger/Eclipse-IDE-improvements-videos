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3" style:family="paragraph" style:parent-style-name="Standard">
      <style:text-properties officeooo:paragraph-rsid="05ff6939"/>
    </style:style>
    <style:style style:name="P4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6" style:family="paragraph" style:parent-style-name="Standard">
      <style:text-properties fo:language="en" fo:country="US" officeooo:paragraph-rsid="06b3db9f"/>
    </style:style>
    <style:style style:name="P7" style:family="paragraph" style:parent-style-name="Standard">
      <style:text-properties fo:font-size="6pt" fo:language="en" fo:country="US" fo:font-weight="bold" officeooo:rsid="001e4eb8" officeooo:paragraph-rsid="06b3db9f" style:font-size-asian="6pt" style:font-weight-asian="bold" style:font-size-complex="6pt" style:font-weight-complex="bold"/>
    </style:style>
    <style:style style:name="P8" style:family="paragraph" style:parent-style-name="Standard">
      <style:text-properties officeooo:paragraph-rsid="07b110d2"/>
    </style:style>
    <style:style style:name="P9" style:family="paragraph" style:parent-style-name="Standard">
      <style:text-properties fo:language="en" fo:country="US" fo:font-weight="normal" officeooo:rsid="0260d497" officeooo:paragraph-rsid="07b110d2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style="normal" fo:font-weight="normal" officeooo:rsid="06e0ce76" officeooo:paragraph-rsid="07b110d2" fo:background-color="#ddddd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7b2634d"/>
    </style:style>
    <style:style style:name="P12" style:family="paragraph" style:parent-style-name="Standard">
      <style:text-properties officeooo:paragraph-rsid="07f81fdf"/>
    </style:style>
    <style:style style:name="P13" style:family="paragraph" style:parent-style-name="Standard">
      <style:text-properties officeooo:rsid="06e0ce76" officeooo:paragraph-rsid="07ba89a3"/>
    </style:style>
    <style:style style:name="P14" style:family="paragraph" style:parent-style-name="Standard">
      <style:text-properties fo:language="en" fo:country="US" fo:font-weight="normal" officeooo:rsid="07b74276" officeooo:paragraph-rsid="07b74276" fo:background-color="transparent" style:font-weight-asian="normal" style:font-weight-complex="normal"/>
    </style:style>
    <style:style style:name="P15" style:family="paragraph" style:parent-style-name="Standard">
      <style:text-properties officeooo:paragraph-rsid="0810b52c"/>
    </style:style>
    <style:style style:name="P16" style:family="paragraph" style:parent-style-name="Standard">
      <style:text-properties fo:language="en" fo:country="US" fo:font-weight="normal" officeooo:rsid="07b90302" officeooo:paragraph-rsid="07b90302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7bb283a" officeooo:paragraph-rsid="07bb283a" fo:background-color="transparent" style:font-weight-asian="normal" style:font-weight-complex="normal"/>
    </style:style>
    <style:style style:name="P18" style:family="paragraph" style:parent-style-name="Standard">
      <style:paragraph-properties style:writing-mode="lr-tb" style:writing-mode-automatic="false"/>
      <style:text-properties officeooo:paragraph-rsid="07fbf47b"/>
    </style:style>
    <style:style style:name="P19" style:family="paragraph" style:parent-style-name="Standard">
      <style:text-properties officeooo:paragraph-rsid="07c91fda"/>
    </style:style>
    <style:style style:name="P20" style:family="paragraph" style:parent-style-name="Standard">
      <style:text-properties fo:language="en" fo:country="US" fo:font-weight="normal" officeooo:rsid="07b90302" officeooo:paragraph-rsid="07c09a0d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officeooo:paragraph-rsid="07bcd6a3"/>
    </style:style>
    <style:style style:name="P22" style:family="paragraph" style:parent-style-name="Standard">
      <style:text-properties fo:font-size="6pt" fo:language="en" fo:country="US" fo:font-weight="bold" officeooo:rsid="001e4eb8" officeooo:paragraph-rsid="07886822" style:font-size-asian="6pt" style:font-weight-asian="bold" style:font-size-complex="6pt" style:font-weight-complex="bold"/>
    </style:style>
    <style:style style:name="P23" style:family="paragraph" style:parent-style-name="Standard">
      <style:text-properties officeooo:paragraph-rsid="07ff0a0d"/>
    </style:style>
    <style:style style:name="P24" style:family="paragraph" style:parent-style-name="Standard">
      <style:text-properties fo:language="en" fo:country="US" fo:font-weight="normal" officeooo:rsid="07c47f72" officeooo:paragraph-rsid="07fd44b1" fo:background-color="transparent" style:font-weight-asian="normal" style:font-weight-complex="normal"/>
    </style:style>
    <style:style style:name="P25" style:family="paragraph" style:parent-style-name="Standard">
      <style:text-properties officeooo:paragraph-rsid="07fd44b1"/>
    </style:style>
    <style:style style:name="P26" style:family="paragraph" style:parent-style-name="Standard" style:list-style-name="L1">
      <style:text-properties officeooo:paragraph-rsid="07cebb6d"/>
    </style:style>
    <style:style style:name="P27" style:family="paragraph" style:parent-style-name="Standard">
      <style:text-properties officeooo:paragraph-rsid="07cebb6d"/>
    </style:style>
    <style:style style:name="P28" style:family="paragraph" style:parent-style-name="Standard">
      <style:text-properties fo:language="en" fo:country="US" fo:font-weight="normal" officeooo:rsid="07c63947" officeooo:paragraph-rsid="07cc07c6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7d17e25" officeooo:paragraph-rsid="07d32837" fo:background-color="transparent" style:font-weight-asian="normal" style:font-weight-complex="normal"/>
    </style:style>
    <style:style style:name="P30" style:family="paragraph" style:parent-style-name="Standard" style:list-style-name="L2">
      <style:text-properties officeooo:paragraph-rsid="07d17e25"/>
    </style:style>
    <style:style style:name="P31" style:family="paragraph" style:parent-style-name="Standard" style:list-style-name="L2">
      <style:paragraph-properties style:writing-mode="lr-tb" style:writing-mode-automatic="false"/>
      <style:text-properties officeooo:rsid="07d17e25" officeooo:paragraph-rsid="07d46037" fo:background-color="transparent"/>
    </style:style>
    <style:style style:name="P32" style:family="paragraph" style:parent-style-name="Standard" style:list-style-name="L2">
      <style:paragraph-properties style:writing-mode="lr-tb" style:writing-mode-automatic="false"/>
      <style:text-properties officeooo:paragraph-rsid="07d46037"/>
    </style:style>
    <style:style style:name="P33" style:family="paragraph" style:parent-style-name="Standard">
      <style:text-properties fo:language="en" fo:country="US" fo:font-weight="normal" officeooo:rsid="07d32837" officeooo:paragraph-rsid="07d3d34f" fo:background-color="transparent" style:font-weight-asian="normal" style:font-weight-complex="normal"/>
    </style:style>
    <style:style style:name="P34" style:family="paragraph" style:parent-style-name="Standard" style:list-style-name="L3">
      <style:text-properties fo:language="en" fo:country="US" fo:font-weight="normal" officeooo:rsid="07d32837" officeooo:paragraph-rsid="07d3d34f" fo:background-color="transparent" style:font-weight-asian="normal" style:font-weight-complex="normal"/>
    </style:style>
    <style:style style:name="P35" style:family="paragraph" style:parent-style-name="Standard">
      <style:text-properties officeooo:paragraph-rsid="07d6579c"/>
    </style:style>
    <style:style style:name="P36" style:family="paragraph" style:parent-style-name="Standard">
      <style:text-properties fo:language="en" fo:country="US" fo:font-weight="normal" officeooo:rsid="07d48ccb" officeooo:paragraph-rsid="07d48ccb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77024ff" officeooo:paragraph-rsid="07cebb6d" fo:background-color="transparent" style:font-weight-asian="normal" style:font-weight-complex="normal"/>
    </style:style>
    <style:style style:name="P38" style:family="paragraph" style:parent-style-name="Standard">
      <style:text-properties officeooo:paragraph-rsid="07d68bcf"/>
    </style:style>
    <style:style style:name="P39" style:family="paragraph" style:parent-style-name="Standard">
      <style:text-properties fo:language="en" fo:country="US" fo:font-weight="normal" officeooo:rsid="07d6579c" officeooo:paragraph-rsid="07d68bcf" fo:background-color="transparent" style:font-weight-asian="normal" style:font-weight-complex="normal"/>
    </style:style>
    <style:style style:name="P40" style:family="paragraph" style:parent-style-name="Standard">
      <style:text-properties officeooo:paragraph-rsid="07d6dab5"/>
    </style:style>
    <style:style style:name="P41" style:family="paragraph" style:parent-style-name="Standard">
      <style:text-properties fo:language="en" fo:country="US" fo:font-weight="normal" officeooo:rsid="07d6dab5" officeooo:paragraph-rsid="07d6dab5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7d81815" officeooo:paragraph-rsid="080d58ad" fo:background-color="transparent" style:font-weight-asian="normal" style:font-weight-complex="normal"/>
    </style:style>
    <style:style style:name="P43" style:family="paragraph" style:parent-style-name="Standard" style:list-style-name="L4">
      <style:text-properties fo:language="en" fo:country="US" fo:font-weight="normal" officeooo:rsid="07d81815" officeooo:paragraph-rsid="07d81866" fo:background-color="transparent" style:font-weight-asian="normal" style:font-weight-complex="normal"/>
    </style:style>
    <style:style style:name="P44" style:family="paragraph" style:parent-style-name="Standard" style:list-style-name="L4">
      <style:text-properties fo:language="en" fo:country="US" fo:font-weight="normal" officeooo:rsid="07d81815" officeooo:paragraph-rsid="07d81815" fo:background-color="transparent" style:font-weight-asian="normal" style:font-weight-complex="normal"/>
    </style:style>
    <style:style style:name="P45" style:family="paragraph" style:parent-style-name="Standard" style:list-style-name="L4">
      <style:text-properties officeooo:paragraph-rsid="07d855d8"/>
    </style:style>
    <style:style style:name="P46" style:family="paragraph" style:parent-style-name="Standard">
      <style:text-properties fo:language="en" fo:country="US" fo:font-weight="normal" officeooo:rsid="077024ff" officeooo:paragraph-rsid="077024ff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5b3289d" officeooo:paragraph-rsid="07886822" fo:background-color="transparent" style:font-weight-asian="normal" style:font-weight-complex="normal"/>
    </style:style>
    <style:style style:name="P48" style:family="paragraph" style:parent-style-name="Standard">
      <style:text-properties officeooo:paragraph-rsid="07886822"/>
    </style:style>
    <style:style style:name="P49" style:family="paragraph" style:parent-style-name="Standard">
      <style:text-properties fo:language="en" fo:country="US" fo:font-style="normal" fo:font-weight="normal" officeooo:rsid="07d3d34f" officeooo:paragraph-rsid="07d855d8" fo:background-color="#ddddd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weight="normal" officeooo:rsid="07dbf5c5" officeooo:paragraph-rsid="07dbf5c5" fo:background-color="transparent" style:font-weight-asian="normal" style:font-weight-complex="normal"/>
    </style:style>
    <style:style style:name="P51" style:family="paragraph" style:parent-style-name="Standard">
      <style:paragraph-properties style:writing-mode="lr-tb" style:writing-mode-automatic="false"/>
      <style:text-properties officeooo:paragraph-rsid="07e53690"/>
    </style:style>
    <style:style style:name="P52" style:family="paragraph" style:parent-style-name="Standard">
      <style:paragraph-properties style:writing-mode="lr-tb" style:writing-mode-automatic="false"/>
      <style:text-properties fo:language="en" fo:country="US" fo:font-weight="normal" officeooo:rsid="07deec69" officeooo:paragraph-rsid="07deec69" fo:background-color="transparent" style:font-weight-asian="normal" style:font-weight-complex="normal"/>
    </style:style>
    <style:style style:name="P53" style:family="paragraph" style:parent-style-name="Standard">
      <style:paragraph-properties style:writing-mode="lr-tb" style:writing-mode-automatic="false"/>
      <style:text-properties officeooo:paragraph-rsid="07e7dc8c"/>
    </style:style>
    <style:style style:name="P54" style:family="paragraph" style:parent-style-name="Standard">
      <style:paragraph-properties style:writing-mode="lr-tb" style:writing-mode-automatic="false"/>
      <style:text-properties fo:language="en" fo:country="US" fo:font-weight="normal" officeooo:rsid="07deec69" officeooo:paragraph-rsid="07e7b743" fo:background-color="transparent" style:font-weight-asian="normal" style:font-weight-complex="normal"/>
    </style:style>
    <style:style style:name="P55" style:family="paragraph" style:parent-style-name="Standard">
      <style:paragraph-properties style:writing-mode="lr-tb" style:writing-mode-automatic="false"/>
      <style:text-properties officeooo:paragraph-rsid="07f51f52"/>
    </style:style>
    <style:style style:name="P56" style:family="paragraph" style:parent-style-name="Standard">
      <style:paragraph-properties style:writing-mode="lr-tb" style:writing-mode-automatic="false"/>
      <style:text-properties fo:language="en" fo:country="US" fo:font-weight="normal" officeooo:rsid="077024ff" officeooo:paragraph-rsid="07f51f52" fo:background-color="transparent" style:font-weight-asian="normal" style:font-weight-complex="normal"/>
    </style:style>
    <style:style style:name="P57" style:family="paragraph" style:parent-style-name="Standard">
      <style:text-properties officeooo:paragraph-rsid="07e976e2"/>
    </style:style>
    <style:style style:name="P58" style:family="paragraph" style:parent-style-name="Standard">
      <style:text-properties fo:language="en" fo:country="US" fo:font-weight="normal" officeooo:rsid="07a2143b" officeooo:paragraph-rsid="07a2143b" fo:background-color="transparent" style:font-weight-asian="normal" style:font-weight-complex="normal"/>
    </style:style>
    <style:style style:name="P59" style:family="paragraph" style:parent-style-name="Standard">
      <style:text-properties officeooo:paragraph-rsid="07eb6bb2"/>
    </style:style>
    <style:style style:name="P60" style:family="paragraph" style:parent-style-name="Standard">
      <style:text-properties fo:language="en" fo:country="US" fo:font-weight="normal" officeooo:rsid="07eb6bb2" officeooo:paragraph-rsid="07eb6bb2" fo:background-color="transparent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6751036" officeooo:paragraph-rsid="07886822" fo:background-color="transparent" style:font-weight-asian="normal" style:font-weight-complex="normal"/>
    </style:style>
    <style:style style:name="P62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63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64" style:family="paragraph" style:parent-style-name="Standard">
      <style:text-properties officeooo:paragraph-rsid="049fc303"/>
    </style:style>
    <style:style style:name="P65" style:family="paragraph" style:parent-style-name="Standard">
      <style:text-properties fo:language="en" fo:country="US" officeooo:rsid="003b1ec5" officeooo:paragraph-rsid="049fc303"/>
    </style:style>
    <style:style style:name="P66" style:family="paragraph" style:parent-style-name="Text_20_body">
      <style:text-properties officeooo:paragraph-rsid="06fd0dfe"/>
    </style:style>
    <style:style style:name="P67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69" style:family="paragraph" style:parent-style-name="Standard" style:list-style-name="L5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language="en" fo:country="US" officeooo:rsid="00136227"/>
    </style:style>
    <style:style style:name="T3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5" style:family="text">
      <style:text-properties fo:language="en" fo:country="US" fo:font-weight="bold" officeooo:rsid="00136227" style:font-weight-asian="bold" style:font-weight-complex="bold"/>
    </style:style>
    <style:style style:name="T6" style:family="text">
      <style:text-properties fo:language="en" fo:country="US" fo:font-weight="bold" officeooo:rsid="00d88c8c" style:font-weight-asian="bold" style:font-weight-complex="bold"/>
    </style:style>
    <style:style style:name="T7" style:family="text">
      <style:text-properties fo:language="en" fo:country="US" fo:font-weight="bold" officeooo:rsid="0032ee51" style:font-weight-asian="bold" style:font-weight-complex="bold"/>
    </style:style>
    <style:style style:name="T8" style:family="text">
      <style:text-properties fo:language="en" fo:country="US" fo:font-weight="normal" officeooo:rsid="0032ee51" style:font-weight-asian="normal" style:font-weight-complex="normal"/>
    </style:style>
    <style:style style:name="T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" style:family="text">
      <style:text-properties fo:language="en" fo:country="US" fo:font-weight="bold" officeooo:rsid="07b110d2" fo:background-color="#fff200" loext:char-shading-value="0" style:font-weight-asian="bold" style:font-weight-complex="bold"/>
    </style:style>
    <style:style style:name="T11" style:family="text">
      <style:text-properties fo:language="en" fo:country="US" fo:font-weight="normal" officeooo:rsid="00d88c8c" style:font-weight-asian="normal" style:font-weight-complex="normal"/>
    </style:style>
    <style:style style:name="T12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3" style:family="text">
      <style:text-properties fo:language="en" fo:country="US" fo:font-weight="normal" officeooo:rsid="07f5d489" style:font-weight-asian="normal" style:font-weight-complex="normal"/>
    </style:style>
    <style:style style:name="T14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5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6" style:family="text">
      <style:text-properties fo:language="en" fo:country="US" fo:font-weight="bold" officeooo:rsid="071e32a1" fo:background-color="#dddddd" loext:char-shading-value="0" style:font-weight-asian="bold" style:font-weight-complex="bold"/>
    </style:style>
    <style:style style:name="T17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18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19" style:family="text">
      <style:text-properties fo:color="#999999" loext:opacity="100%" fo:font-weight="bold" officeooo:rsid="001e4eb8" style:font-weight-asian="bold" style:font-weight-complex="bold"/>
    </style:style>
    <style:style style:name="T20" style:family="text">
      <style:text-properties fo:color="#999999" loext:opacity="100%" fo:font-weight="bold" officeooo:rsid="00373dfb" style:font-weight-asian="bold" style:font-weight-complex="bold"/>
    </style:style>
    <style:style style:name="T21" style:family="text">
      <style:text-properties fo:color="#999999" loext:opacity="100%" fo:font-weight="bold" officeooo:rsid="01ebd016" style:font-weight-asian="bold" style:font-weight-complex="bold"/>
    </style:style>
    <style:style style:name="T22" style:family="text">
      <style:text-properties fo:color="#999999" loext:opacity="100%" fo:font-weight="bold" officeooo:rsid="0635d95a" style:font-weight-asian="bold" style:font-weight-complex="bold"/>
    </style:style>
    <style:style style:name="T23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4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25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bold" officeooo:rsid="0260d497" fo:background-color="transparent" loext:char-shading-value="0" style:font-weight-asian="bold" style:font-weight-complex="bold"/>
    </style:style>
    <style:style style:name="T28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language="en" fo:country="US" fo:font-weight="normal" officeooo:rsid="07b110d2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bold" officeooo:rsid="07b110d2" fo:background-color="transparent" loext:char-shading-value="0" style:font-weight-asian="bold" style:font-weight-complex="bold"/>
    </style:style>
    <style:style style:name="T33" style:family="text">
      <style:text-properties fo:language="en" fo:country="US" fo:font-weight="normal" officeooo:rsid="080fb100" fo:background-color="transparent" loext:char-shading-value="0" style:font-weight-asian="normal" style:font-weight-complex="normal"/>
    </style:style>
    <style:style style:name="T34" style:family="text">
      <style:text-properties fo:language="en" fo:country="US" fo:font-style="normal" fo:font-weight="normal" officeooo:rsid="06e0ce76" fo:background-color="#dddddd" loext:char-shading-value="0" style:font-style-asian="normal" style:font-weight-asian="normal" style:font-style-complex="normal" style:font-weight-complex="normal"/>
    </style:style>
    <style:style style:name="T35" style:family="text">
      <style:text-properties fo:language="en" fo:country="US" fo:font-style="normal" fo:font-weight="normal" officeooo:rsid="080fb100" fo:background-color="#dddddd" loext:char-shading-value="0" style:font-style-asian="normal" style:font-weight-asian="normal" style:font-style-complex="normal" style:font-weight-complex="normal"/>
    </style:style>
    <style:style style:name="T36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37" style:family="text">
      <style:text-properties fo:language="en" fo:country="US" fo:font-weight="normal" officeooo:rsid="07b43811" fo:background-color="#dddddd" loext:char-shading-value="0" style:font-weight-asian="normal" style:font-weight-complex="normal"/>
    </style:style>
    <style:style style:name="T38" style:family="text">
      <style:text-properties fo:language="en" fo:country="US" fo:font-weight="normal" officeooo:rsid="07f78712" fo:background-color="#dddddd" loext:char-shading-value="0" style:font-weight-asian="normal" style:font-weight-complex="normal"/>
    </style:style>
    <style:style style:name="T39" style:family="text">
      <style:text-properties fo:language="en" fo:country="US" fo:font-weight="normal" officeooo:rsid="07b2634d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812e0c6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7f81fdf" fo:background-color="#dddddd" loext:char-shading-value="0" style:font-weight-asian="normal" style:font-weight-complex="normal"/>
    </style:style>
    <style:style style:name="T42" style:family="text">
      <style:text-properties fo:language="en" fo:country="US"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43" style:family="text">
      <style:text-properties fo:language="en" fo:country="US" fo:font-style="normal" fo:font-weight="normal" officeooo:rsid="07b90302" fo:background-color="#dddddd" loext:char-shading-value="0" style:font-style-asian="normal" style:font-weight-asian="normal" style:font-style-complex="normal" style:font-weight-complex="normal"/>
    </style:style>
    <style:style style:name="T44" style:family="text">
      <style:text-properties fo:language="en" fo:country="US" fo:font-style="normal" fo:font-weight="bold" fo:background-color="#dddddd" loext:char-shading-value="0" style:font-style-asian="normal" style:font-weight-asian="bold" style:font-style-complex="normal" style:font-weight-complex="bold"/>
    </style:style>
    <style:style style:name="T45" style:family="text">
      <style:text-properties officeooo:rsid="07b90302"/>
    </style:style>
    <style:style style:name="T46" style:family="text">
      <style:text-properties fo:language="en" fo:country="US" fo:font-style="italic" fo:font-weight="normal" officeooo:rsid="07b5eeae" fo:background-color="transparent" loext:char-shading-value="0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weight="normal" officeooo:rsid="07b5eeae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7b90302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7ba89a3" fo:background-color="transparent" loext:char-shading-value="0" style:font-weight-asian="normal" style:font-weight-complex="normal"/>
    </style:style>
    <style:style style:name="T50" style:family="text">
      <style:text-properties officeooo:rsid="07ba89a3"/>
    </style:style>
    <style:style style:name="T51" style:family="text">
      <style:text-properties officeooo:rsid="07b110d2"/>
    </style:style>
    <style:style style:name="T52" style:family="text">
      <style:text-properties fo:font-style="italic" fo:font-weight="bold" officeooo:rsid="07b5eeae" style:font-style-asian="italic" style:font-weight-asian="bold" style:font-style-complex="italic" style:font-weight-complex="bold"/>
    </style:style>
    <style:style style:name="T53" style:family="text">
      <style:text-properties fo:font-weight="bold" officeooo:rsid="07b5eeae" style:font-weight-asian="bold" style:font-weight-complex="bold"/>
    </style:style>
    <style:style style:name="T54" style:family="text">
      <style:text-properties fo:font-weight="normal" officeooo:rsid="07b5eeae" style:font-weight-asian="normal" style:font-weight-complex="normal"/>
    </style:style>
    <style:style style:name="T55" style:family="text">
      <style:text-properties fo:font-weight="normal" officeooo:rsid="07b90302" style:font-weight-asian="normal" style:font-weight-complex="normal"/>
    </style:style>
    <style:style style:name="T56" style:family="text">
      <style:text-properties officeooo:rsid="07b5eeae"/>
    </style:style>
    <style:style style:name="T57" style:family="text">
      <style:text-properties fo:font-style="italic" officeooo:rsid="07b5eeae" style:font-style-asian="italic" style:font-style-complex="italic"/>
    </style:style>
    <style:style style:name="T58" style:family="text">
      <style:text-properties fo:font-weight="bold" officeooo:rsid="07b110d2" style:font-weight-asian="bold" style:font-weight-complex="bold"/>
    </style:style>
    <style:style style:name="T59" style:family="text">
      <style:text-properties fo:font-style="italic" fo:font-weight="bold" officeooo:rsid="07b74276" fo:background-color="#fff200" loext:char-shading-value="0" style:font-style-asian="italic" style:font-weight-asian="bold" style:font-style-complex="italic" style:font-weight-complex="bold"/>
    </style:style>
    <style:style style:name="T60" style:family="text">
      <style:text-properties fo:language="en" fo:country="US" fo:font-weight="normal" officeooo:rsid="07b74276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7fa1813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bold" officeooo:rsid="07b74276" fo:background-color="transparent" loext:char-shading-value="0" style:font-weight-asian="bold" style:font-weight-complex="bold"/>
    </style:style>
    <style:style style:name="T63" style:family="text">
      <style:text-properties fo:language="en" fo:country="US" fo:font-weight="bold" officeooo:rsid="07b90302" fo:background-color="transparent" loext:char-shading-value="0" style:font-weight-asian="bold" style:font-weight-complex="bold"/>
    </style:style>
    <style:style style:name="T64" style:family="text">
      <style:text-properties fo:language="en" fo:country="US" fo:font-style="normal" fo:font-weight="bold" officeooo:rsid="07b90302" fo:background-color="#dddddd" loext:char-shading-value="0" style:font-style-asian="normal" style:font-weight-asian="bold" style:font-style-complex="normal" style:font-weight-complex="bold"/>
    </style:style>
    <style:style style:name="T65" style:family="text">
      <style:text-properties fo:language="en" fo:country="US" fo:font-weight="normal" officeooo:rsid="0810b52c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bold" officeooo:rsid="0810b52c" fo:background-color="transparent" loext:char-shading-value="0" style:font-weight-asian="bold" style:font-weight-complex="bold"/>
    </style:style>
    <style:style style:name="T67" style:family="text">
      <style:text-properties fo:language="en" fo:country="US" fo:font-weight="bold" officeooo:rsid="07fa4393" fo:background-color="transparent" loext:char-shading-value="0" style:font-weight-asian="bold" style:font-weight-complex="bold"/>
    </style:style>
    <style:style style:name="T68" style:family="text">
      <style:text-properties fo:language="en" fo:country="US" fo:font-weight="normal" officeooo:rsid="07bb283a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bold" officeooo:rsid="07bb283a" fo:background-color="transparent" loext:char-shading-value="0" style:font-weight-asian="bold" style:font-weight-complex="bold"/>
    </style:style>
    <style:style style:name="T70" style:family="text">
      <style:text-properties fo:language="en" fo:country="US" fo:font-style="italic" fo:font-weight="bold" officeooo:rsid="07bb283a" fo:background-color="transparent" loext:char-shading-value="0" style:font-style-asian="italic" style:font-weight-asian="bold" style:font-style-complex="italic" style:font-weight-complex="bold"/>
    </style:style>
    <style:style style:name="T71" style:family="text">
      <style:text-properties fo:language="en" fo:country="US" fo:font-weight="bold" officeooo:rsid="080fb100" fo:background-color="transparent" loext:char-shading-value="0" style:font-weight-asian="bold" style:font-weight-complex="bold"/>
    </style:style>
    <style:style style:name="T72" style:family="text">
      <style:text-properties fo:language="en" fo:country="US" fo:font-weight="normal" officeooo:rsid="07bfe9b0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bold" officeooo:rsid="07c048a1" fo:background-color="transparent" loext:char-shading-value="0" style:font-weight-asian="bold" style:font-weight-complex="bold"/>
    </style:style>
    <style:style style:name="T74" style:family="text">
      <style:text-properties fo:language="en" fo:country="US" fo:font-weight="bold" officeooo:rsid="07bfe9b0" fo:background-color="transparent" loext:char-shading-value="0" style:font-weight-asian="bold" style:font-weight-complex="bold"/>
    </style:style>
    <style:style style:name="T75" style:family="text">
      <style:text-properties fo:language="en" fo:country="US" fo:font-style="italic" fo:font-weight="bold" officeooo:rsid="07bfe9b0" fo:background-color="transparent" loext:char-shading-value="0" style:font-style-asian="italic" style:font-weight-asian="bold" style:font-style-complex="italic" style:font-weight-complex="bold"/>
    </style:style>
    <style:style style:name="T76" style:family="text">
      <style:text-properties fo:language="en" fo:country="US" fo:font-style="italic" fo:font-weight="bold" officeooo:rsid="07c048a1" fo:background-color="transparent" loext:char-shading-value="0" style:font-style-asian="italic" style:font-weight-asian="bold" style:font-style-complex="italic" style:font-weight-complex="bold"/>
    </style:style>
    <style:style style:name="T77" style:family="text">
      <style:text-properties fo:language="en" fo:country="US" fo:font-weight="normal" officeooo:rsid="07c048a1" fo:background-color="transparent" loext:char-shading-value="0" style:font-weight-asian="normal" style:font-weight-complex="normal"/>
    </style:style>
    <style:style style:name="T78" style:family="text">
      <style:text-properties fo:language="en" fo:country="US" fo:font-style="italic" fo:font-weight="normal" officeooo:rsid="07c048a1" fo:background-color="transparent" loext:char-shading-value="0" style:font-style-asian="italic" style:font-weight-asian="normal" style:font-style-complex="italic" style:font-weight-complex="normal"/>
    </style:style>
    <style:style style:name="T79" style:family="text">
      <style:text-properties fo:language="en" fo:country="US" fo:font-style="normal" fo:font-weight="normal" officeooo:rsid="07fbf47b" fo:background-color="#dddddd" loext:char-shading-value="0" style:font-style-asian="normal" style:font-weight-asian="normal" style:font-style-complex="normal" style:font-weight-complex="normal"/>
    </style:style>
    <style:style style:name="T80" style:family="text">
      <style:text-properties fo:color="#999999" loext:opacity="100%" fo:language="en" fo:country="US" fo:font-style="normal" fo:font-weight="normal" officeooo:rsid="028af2ba" fo:background-color="#dddddd" loext:char-shading-value="0" style:font-style-asian="normal" style:font-weight-asian="normal" style:font-style-complex="normal" style:font-weight-complex="normal"/>
    </style:style>
    <style:style style:name="T81" style:family="text">
      <style:text-properties fo:color="#999999" loext:opacity="100%" fo:language="en" fo:country="US" fo:font-style="normal" fo:font-weight="normal" officeooo:rsid="03bb9eb9" fo:background-color="#dddddd" loext:char-shading-value="0" style:font-style-asian="normal" style:font-weight-asian="normal" style:font-style-complex="normal" style:font-weight-complex="normal"/>
    </style:style>
    <style:style style:name="T82" style:family="text">
      <style:text-properties fo:language="en" fo:country="US" fo:font-style="normal" fo:font-weight="normal" officeooo:rsid="080de96b" fo:background-color="#dddddd" loext:char-shading-value="0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fo:font-weight="normal" officeooo:rsid="07fd44b1" fo:background-color="#dddddd" loext:char-shading-value="0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weight="bold" officeooo:rsid="07c18edb" fo:background-color="transparent" loext:char-shading-value="0" style:font-weight-asian="bold" style:font-weight-complex="bold"/>
    </style:style>
    <style:style style:name="T85" style:family="text">
      <style:text-properties fo:language="en" fo:country="US" fo:font-weight="normal" officeooo:rsid="07c18edb" fo:background-color="transparent" loext:char-shading-value="0" style:font-weight-asian="normal" style:font-weight-complex="normal"/>
    </style:style>
    <style:style style:name="T86" style:family="text">
      <style:text-properties fo:language="en" fo:country="US" fo:font-style="italic" fo:font-weight="bold" officeooo:rsid="07b90302" fo:background-color="transparent" loext:char-shading-value="0" style:font-style-asian="italic" style:font-weight-asian="bold" style:font-style-complex="italic" style:font-weight-complex="bold"/>
    </style:style>
    <style:style style:name="T87" style:family="text">
      <style:text-properties fo:color="#999999" loext:opacity="100%" fo:font-weight="bold" officeooo:rsid="05cc65ea" style:font-weight-asian="bold" style:font-weight-complex="bold"/>
    </style:style>
    <style:style style:name="T88" style:family="text">
      <style:text-properties fo:color="#999999" loext:opacity="100%" fo:font-weight="bold" officeooo:rsid="077024ff" style:font-weight-asian="bold" style:font-weight-complex="bold"/>
    </style:style>
    <style:style style:name="T89" style:family="text">
      <style:text-properties style:use-window-font-color="true" loext:opacity="0%" fo:language="en" fo:country="US" fo:font-style="normal" fo:font-weight="normal" officeooo:rsid="07fd44b1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style:use-window-font-color="true" loext:opacity="0%" fo:language="en" fo:country="US" fo:font-style="normal" fo:font-weight="normal" officeooo:rsid="07b90302" fo:background-color="transparent" loext:char-shading-value="0" style:font-style-asian="normal" style:font-weight-asian="normal" style:font-style-complex="normal" style:font-weight-complex="normal"/>
    </style:style>
    <style:style style:name="T91" style:family="text">
      <style:text-properties style:use-window-font-color="true" loext:opacity="0%" fo:language="en" fo:country="US" fo:font-style="italic" fo:font-weight="bold" officeooo:rsid="07b90302" fo:background-color="transparent" loext:char-shading-value="0" style:font-style-asian="italic" style:font-weight-asian="bold" style:font-style-complex="italic" style:font-weight-complex="bold"/>
    </style:style>
    <style:style style:name="T92" style:family="text">
      <style:text-properties style:use-window-font-color="true" loext:opacity="0%" fo:language="en" fo:country="US" fo:font-style="normal" fo:font-weight="bold" officeooo:rsid="07b90302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style:use-window-font-color="true" loext:opacity="0%" fo:language="en" fo:country="US" fo:font-weight="normal" officeooo:rsid="07c47f72" fo:background-color="transparent" loext:char-shading-value="0" style:font-weight-asian="normal" style:font-weight-complex="normal"/>
    </style:style>
    <style:style style:name="T94" style:family="text">
      <style:text-properties fo:language="en" fo:country="US" fo:font-weight="normal" officeooo:rsid="07fd44b1" fo:background-color="transparent" loext:char-shading-value="0" style:font-weight-asian="normal" style:font-weight-complex="normal"/>
    </style:style>
    <style:style style:name="T95" style:family="text">
      <style:text-properties fo:language="en" fo:country="US" fo:font-weight="normal" officeooo:rsid="07c47f72" fo:background-color="transparent" loext:char-shading-value="0" style:font-weight-asian="normal" style:font-weight-complex="normal"/>
    </style:style>
    <style:style style:name="T96" style:family="text">
      <style:text-properties fo:language="en" fo:country="US" fo:font-weight="normal" officeooo:rsid="07c91fda" fo:background-color="transparent" loext:char-shading-value="0" style:font-weight-asian="normal" style:font-weight-complex="normal"/>
    </style:style>
    <style:style style:name="T97" style:family="text">
      <style:text-properties fo:language="en" fo:country="US" fo:font-weight="normal" officeooo:rsid="07c9c702" fo:background-color="transparent" loext:char-shading-value="0" style:font-weight-asian="normal" style:font-weight-complex="normal"/>
    </style:style>
    <style:style style:name="T98" style:family="text">
      <style:text-properties fo:language="en" fo:country="US" fo:font-weight="bold" officeooo:rsid="07c47f72" fo:background-color="transparent" loext:char-shading-value="0" style:font-weight-asian="bold" style:font-weight-complex="bold"/>
    </style:style>
    <style:style style:name="T99" style:family="text">
      <style:text-properties fo:language="en" fo:country="US" fo:font-weight="normal" officeooo:rsid="080de96b" fo:background-color="transparent" loext:char-shading-value="0" style:font-weight-asian="normal" style:font-weight-complex="normal"/>
    </style:style>
    <style:style style:name="T100" style:family="text">
      <style:text-properties fo:language="en" fo:country="US" fo:font-style="italic" fo:font-weight="bold" officeooo:rsid="07c47f72" fo:background-color="transparent" loext:char-shading-value="0" style:font-style-asian="italic" style:font-weight-asian="bold" style:font-style-complex="italic" style:font-weight-complex="bold"/>
    </style:style>
    <style:style style:name="T101" style:family="text">
      <style:text-properties fo:language="en" fo:country="US" fo:font-style="normal" fo:font-weight="normal" officeooo:rsid="07fea897" fo:background-color="#dddddd" loext:char-shading-value="0" style:font-style-asian="normal" style:font-weight-asian="normal" style:font-style-complex="normal" style:font-weight-complex="normal"/>
    </style:style>
    <style:style style:name="T102" style:family="text">
      <style:text-properties fo:language="en" fo:country="US" fo:font-style="normal" fo:font-weight="normal" officeooo:rsid="07ff0a0d" fo:background-color="#dddddd" loext:char-shading-value="0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weight="normal" officeooo:rsid="07c63947" fo:background-color="transparent" loext:char-shading-value="0" style:font-weight-asian="normal" style:font-weight-complex="normal"/>
    </style:style>
    <style:style style:name="T104" style:family="text">
      <style:text-properties fo:language="en" fo:country="US" fo:font-style="italic" fo:font-weight="bold" officeooo:rsid="00ab4647" fo:background-color="#fff200" loext:char-shading-value="0" style:font-style-asian="italic" style:font-weight-asian="bold" style:font-style-complex="italic" style:font-weight-complex="bold"/>
    </style:style>
    <style:style style:name="T105" style:family="text">
      <style:text-properties fo:language="en" fo:country="US" fo:font-style="italic" fo:font-weight="normal" officeooo:rsid="00ab4647" fo:background-color="#fff200" loext:char-shading-value="0" style:font-style-asian="italic" style:font-weight-asian="normal" style:font-style-complex="italic" style:font-weight-complex="normal"/>
    </style:style>
    <style:style style:name="T106" style:family="text">
      <style:text-properties fo:language="en" fo:country="US" fo:font-weight="normal" officeooo:rsid="07cebb6d" fo:background-color="transparent" loext:char-shading-value="0" style:font-weight-asian="normal" style:font-weight-complex="normal"/>
    </style:style>
    <style:style style:name="T107" style:family="text">
      <style:text-properties fo:language="en" fo:country="US" fo:font-weight="normal" officeooo:rsid="07ff0a0d" fo:background-color="transparent" loext:char-shading-value="0" style:font-weight-asian="normal" style:font-weight-complex="normal"/>
    </style:style>
    <style:style style:name="T108" style:family="text">
      <style:text-properties fo:language="en" fo:country="US" fo:font-weight="bold" officeooo:rsid="07cebb6d" fo:background-color="transparent" loext:char-shading-value="0" style:font-weight-asian="bold" style:font-weight-complex="bold"/>
    </style:style>
    <style:style style:name="T109" style:family="text">
      <style:text-properties fo:language="en" fo:country="US" fo:font-style="italic" fo:font-weight="bold" officeooo:rsid="07b90302" fo:background-color="#dddddd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style="italic" fo:font-weight="normal" officeooo:rsid="07b90302" fo:background-color="#dddddd" loext:char-shading-value="0" style:font-style-asian="italic" style:font-weight-asian="normal" style:font-style-complex="italic" style:font-weight-complex="normal"/>
    </style:style>
    <style:style style:name="T111" style:family="text">
      <style:text-properties fo:language="en" fo:country="US" fo:font-style="italic" fo:font-weight="bold" officeooo:rsid="07c63947" fo:background-color="transparent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normal" officeooo:rsid="07cebb6d" fo:background-color="transparent" loext:char-shading-value="0" style:font-style-asian="italic" style:font-weight-asian="normal" style:font-style-complex="italic" style:font-weight-complex="normal"/>
    </style:style>
    <style:style style:name="T113" style:family="text">
      <style:text-properties fo:language="en" fo:country="US" fo:font-weight="bold" officeooo:rsid="07c63947" fo:background-color="transparent" loext:char-shading-value="0" style:font-weight-asian="bold" style:font-weight-complex="bold"/>
    </style:style>
    <style:style style:name="T114" style:family="text">
      <style:text-properties officeooo:rsid="07d32837"/>
    </style:style>
    <style:style style:name="T115" style:family="text">
      <style:text-properties officeooo:rsid="080fb100"/>
    </style:style>
    <style:style style:name="T116" style:family="text">
      <style:text-properties fo:language="en" fo:country="US" fo:font-weight="normal" officeooo:rsid="07d17e25" fo:background-color="transparent" loext:char-shading-value="0" style:font-weight-asian="normal" style:font-weight-complex="normal"/>
    </style:style>
    <style:style style:name="T117" style:family="text">
      <style:text-properties fo:language="en" fo:country="US" fo:font-weight="bold" officeooo:rsid="07d17e25" fo:background-color="transparent" loext:char-shading-value="0" style:font-weight-asian="bold" style:font-weight-complex="bold"/>
    </style:style>
    <style:style style:name="T118" style:family="text">
      <style:text-properties officeooo:rsid="0810b52c"/>
    </style:style>
    <style:style style:name="T1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0" style:family="text">
      <style:text-properties officeooo:rsid="07d3d34f"/>
    </style:style>
    <style:style style:name="T121" style:family="text">
      <style:text-properties officeooo:rsid="080de96b" fo:background-color="transparent" loext:char-shading-value="0"/>
    </style:style>
    <style:style style:name="T122" style:family="text">
      <style:text-properties officeooo:rsid="07d46037" fo:background-color="transparent" loext:char-shading-value="0"/>
    </style:style>
    <style:style style:name="T123" style:family="text">
      <style:text-properties fo:font-weight="bold" officeooo:rsid="07d46037" fo:background-color="transparent" loext:char-shading-value="0" style:font-weight-asian="bold" style:font-weight-complex="bold"/>
    </style:style>
    <style:style style:name="T124" style:family="text">
      <style:text-properties fo:font-weight="bold" officeooo:rsid="07d48ccb" fo:background-color="transparent" loext:char-shading-value="0" style:font-weight-asian="bold" style:font-weight-complex="bold"/>
    </style:style>
    <style:style style:name="T125" style:family="text">
      <style:text-properties fo:font-weight="bold" officeooo:rsid="0810b52c" fo:background-color="transparent" loext:char-shading-value="0" style:font-weight-asian="bold" style:font-weight-complex="bold"/>
    </style:style>
    <style:style style:name="T126" style:family="text">
      <style:text-properties fo:language="en" fo:country="US" fo:font-style="normal" fo:font-weight="normal" officeooo:rsid="07d3d34f" fo:background-color="#dddddd" loext:char-shading-value="0" style:font-style-asian="normal" style:font-weight-asian="normal" style:font-style-complex="normal" style:font-weight-complex="normal"/>
    </style:style>
    <style:style style:name="T127" style:family="text">
      <style:text-properties fo:language="en" fo:country="US" fo:font-style="normal" fo:font-weight="normal" officeooo:rsid="07d48ccb" fo:background-color="#dddddd" loext:char-shading-value="0" style:font-style-asian="normal" style:font-weight-asian="normal" style:font-style-complex="normal" style:font-weight-complex="normal"/>
    </style:style>
    <style:style style:name="T128" style:family="text">
      <style:text-properties fo:language="en" fo:country="US" fo:font-style="normal" fo:font-weight="normal" officeooo:rsid="07d46037" fo:background-color="#dddddd" loext:char-shading-value="0" style:font-style-asian="normal" style:font-weight-asian="normal" style:font-style-complex="normal" style:font-weight-complex="normal"/>
    </style:style>
    <style:style style:name="T129" style:family="text">
      <style:text-properties fo:color="#999999" loext:opacity="100%" fo:font-style="normal" officeooo:rsid="028af2ba" style:font-style-asian="normal" style:font-style-complex="normal"/>
    </style:style>
    <style:style style:name="T130" style:family="text">
      <style:text-properties fo:color="#999999" loext:opacity="100%" fo:font-style="normal" officeooo:rsid="03bb9eb9" style:font-style-asian="normal" style:font-style-complex="normal"/>
    </style:style>
    <style:style style:name="T131" style:family="text">
      <style:text-properties fo:font-style="normal" officeooo:rsid="07d46037" style:font-style-asian="normal" style:font-style-complex="normal"/>
    </style:style>
    <style:style style:name="T132" style:family="text">
      <style:text-properties officeooo:rsid="07d46037"/>
    </style:style>
    <style:style style:name="T133" style:family="text">
      <style:text-properties fo:font-style="italic" officeooo:rsid="07d3d34f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normal" style:font-style-asian="normal" style:font-style-complex="normal"/>
    </style:style>
    <style:style style:name="T136" style:family="text">
      <style:text-properties fo:language="en" fo:country="US" fo:font-weight="bold" officeooo:rsid="07d48ccb" fo:background-color="transparent" loext:char-shading-value="0" style:font-weight-asian="bold" style:font-weight-complex="bold"/>
    </style:style>
    <style:style style:name="T137" style:family="text">
      <style:text-properties fo:language="en" fo:country="US" fo:font-weight="normal" officeooo:rsid="07d48ccb" fo:background-color="transparent" loext:char-shading-value="0" style:font-weight-asian="normal" style:font-weight-complex="normal"/>
    </style:style>
    <style:style style:name="T138" style:family="text">
      <style:text-properties fo:language="en" fo:country="US" fo:font-weight="normal" officeooo:rsid="07d6579c" fo:background-color="transparent" loext:char-shading-value="0" style:font-weight-asian="normal" style:font-weight-complex="normal"/>
    </style:style>
    <style:style style:name="T139" style:family="text">
      <style:text-properties fo:language="en" fo:country="US" fo:font-weight="normal" officeooo:rsid="077024ff" fo:background-color="transparent" loext:char-shading-value="0" style:font-weight-asian="normal" style:font-weight-complex="normal"/>
    </style:style>
    <style:style style:name="T140" style:family="text">
      <style:text-properties fo:language="en" fo:country="US" fo:font-weight="bold" officeooo:rsid="077024ff" fo:background-color="transparent" loext:char-shading-value="0" style:font-weight-asian="bold" style:font-weight-complex="bold"/>
    </style:style>
    <style:style style:name="T141" style:family="text">
      <style:text-properties officeooo:rsid="07d6579c"/>
    </style:style>
    <style:style style:name="T142" style:family="text">
      <style:text-properties officeooo:rsid="080de96b"/>
    </style:style>
    <style:style style:name="T143" style:family="text">
      <style:text-properties fo:language="en" fo:country="US" fo:font-weight="normal" officeooo:rsid="07d68bcf" fo:background-color="transparent" loext:char-shading-value="0" style:font-weight-asian="normal" style:font-weight-complex="normal"/>
    </style:style>
    <style:style style:name="T144" style:family="text">
      <style:text-properties fo:language="en" fo:country="US" fo:font-style="italic" fo:font-weight="bold" officeooo:rsid="07d6579c" fo:background-color="transparent" loext:char-shading-value="0" style:font-style-asian="italic" style:font-weight-asian="bold" style:font-style-complex="italic" style:font-weight-complex="bold"/>
    </style:style>
    <style:style style:name="T145" style:family="text">
      <style:text-properties fo:language="en" fo:country="US" fo:font-weight="normal" officeooo:rsid="07d6dab5" fo:background-color="transparent" loext:char-shading-value="0" style:font-weight-asian="normal" style:font-weight-complex="normal"/>
    </style:style>
    <style:style style:name="T146" style:family="text">
      <style:text-properties fo:language="en" fo:country="US" fo:font-weight="normal" officeooo:rsid="07d6dab5" fo:background-color="#dddddd" loext:char-shading-value="0" style:font-weight-asian="normal" style:font-weight-complex="normal"/>
    </style:style>
    <style:style style:name="T147" style:family="text">
      <style:text-properties fo:language="en" fo:country="US" fo:font-style="italic" fo:font-weight="bold" officeooo:rsid="07d6dab5" fo:background-color="#dddddd" loext:char-shading-value="0" style:font-style-asian="italic" style:font-weight-asian="bold" style:font-style-complex="italic" style:font-weight-complex="bold"/>
    </style:style>
    <style:style style:name="T148" style:family="text">
      <style:text-properties fo:language="en" fo:country="US" fo:font-style="italic" fo:font-weight="bold" officeooo:rsid="077024ff" fo:background-color="transparent" loext:char-shading-value="0" style:font-style-asian="italic" style:font-weight-asian="bold" style:font-style-complex="italic" style:font-weight-complex="bold"/>
    </style:style>
    <style:style style:name="T149" style:family="text">
      <style:text-properties fo:language="en" fo:country="US" fo:font-weight="bold" officeooo:rsid="07d6dab5" fo:background-color="transparent" loext:char-shading-value="0" style:font-weight-asian="bold" style:font-weight-complex="bold"/>
    </style:style>
    <style:style style:name="T150" style:family="text">
      <style:text-properties fo:font-style="italic" fo:font-weight="bold" officeooo:rsid="077024ff" style:font-style-asian="italic" style:font-weight-asian="bold" style:font-style-complex="italic" style:font-weight-complex="bold"/>
    </style:style>
    <style:style style:name="T151" style:family="text">
      <style:text-properties officeooo:rsid="077024ff"/>
    </style:style>
    <style:style style:name="T152" style:family="text">
      <style:text-properties officeooo:rsid="07d9e49e"/>
    </style:style>
    <style:style style:name="T153" style:family="text">
      <style:text-properties officeooo:rsid="07d81866"/>
    </style:style>
    <style:style style:name="T154" style:family="text">
      <style:text-properties fo:language="en" fo:country="US" fo:font-weight="normal" officeooo:rsid="07d855d8" fo:background-color="transparent" loext:char-shading-value="0" style:font-weight-asian="normal" style:font-weight-complex="normal"/>
    </style:style>
    <style:style style:name="T155" style:family="text">
      <style:text-properties fo:language="en" fo:country="US" fo:font-weight="bold" officeooo:rsid="07d855d8" fo:background-color="transparent" loext:char-shading-value="0" style:font-weight-asian="bold" style:font-weight-complex="bold"/>
    </style:style>
    <style:style style:name="T156" style:family="text">
      <style:text-properties fo:language="en" fo:country="US" fo:font-weight="normal" officeooo:rsid="0804eb6c" fo:background-color="transparent" loext:char-shading-value="0" style:font-weight-asian="normal" style:font-weight-complex="normal"/>
    </style:style>
    <style:style style:name="T157" style:family="text">
      <style:text-properties fo:language="en" fo:country="US" fo:font-weight="normal" officeooo:rsid="08059f17" fo:background-color="transparent" loext:char-shading-value="0" style:font-weight-asian="normal" style:font-weight-complex="normal"/>
    </style:style>
    <style:style style:name="T158" style:family="text">
      <style:text-properties fo:language="en" fo:country="US" fo:font-weight="normal" officeooo:rsid="07deb549" fo:background-color="transparent" loext:char-shading-value="0" style:font-weight-asian="normal" style:font-weight-complex="normal"/>
    </style:style>
    <style:style style:name="T159" style:family="text">
      <style:text-properties fo:language="en" fo:country="US" fo:font-style="normal" fo:font-weight="normal" officeooo:rsid="07deb549" fo:background-color="#dddddd" loext:char-shading-value="0" style:font-style-asian="normal" style:font-weight-asian="normal" style:font-style-complex="normal" style:font-weight-complex="normal"/>
    </style:style>
    <style:style style:name="T160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61" style:family="text">
      <style:text-properties fo:color="#999999" loext:opacity="100%" fo:language="en" fo:country="US" fo:font-weight="bold" officeooo:rsid="07bcd6a3" style:font-weight-asian="bold" style:font-weight-complex="bold"/>
    </style:style>
    <style:style style:name="T162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63" style:family="text">
      <style:text-properties fo:language="en" fo:country="US" fo:font-weight="normal" officeooo:rsid="07deec69" fo:background-color="transparent" loext:char-shading-value="0" style:font-weight-asian="normal" style:font-weight-complex="normal"/>
    </style:style>
    <style:style style:name="T164" style:family="text">
      <style:text-properties fo:language="en" fo:country="US" fo:font-weight="bold" officeooo:rsid="07deec69" fo:background-color="transparent" loext:char-shading-value="0" style:font-weight-asian="bold" style:font-weight-complex="bold"/>
    </style:style>
    <style:style style:name="T165" style:family="text">
      <style:text-properties fo:language="en" fo:country="US" fo:font-weight="normal" officeooo:rsid="07e3439a" fo:background-color="transparent" loext:char-shading-value="0" style:font-weight-asian="normal" style:font-weight-complex="normal"/>
    </style:style>
    <style:style style:name="T166" style:family="text">
      <style:text-properties fo:language="en" fo:country="US" fo:font-style="italic" fo:font-weight="bold" officeooo:rsid="07deec69" fo:background-color="transparent" loext:char-shading-value="0" style:font-style-asian="italic" style:font-weight-asian="bold" style:font-style-complex="italic" style:font-weight-complex="bold"/>
    </style:style>
    <style:style style:name="T167" style:family="text">
      <style:text-properties fo:language="en" fo:country="US" fo:font-weight="normal" officeooo:rsid="07e1abd3" fo:background-color="transparent" loext:char-shading-value="0" style:font-weight-asian="normal" style:font-weight-complex="normal"/>
    </style:style>
    <style:style style:name="T168" style:family="text">
      <style:text-properties fo:language="en" fo:country="US" fo:font-style="italic" fo:font-weight="normal" officeooo:rsid="07deec69" fo:background-color="transparent" loext:char-shading-value="0" style:font-style-asian="italic" style:font-weight-asian="normal" style:font-style-complex="italic" style:font-weight-complex="normal"/>
    </style:style>
    <style:style style:name="T169" style:family="text">
      <style:text-properties fo:language="en" fo:country="US" fo:font-weight="normal" officeooo:rsid="07e53690" fo:background-color="transparent" loext:char-shading-value="0" style:font-weight-asian="normal" style:font-weight-complex="normal"/>
    </style:style>
    <style:style style:name="T170" style:family="text">
      <style:text-properties fo:language="en" fo:country="US" fo:font-weight="normal" officeooo:rsid="07e41a5c" fo:background-color="transparent" loext:char-shading-value="0" style:font-weight-asian="normal" style:font-weight-complex="normal"/>
    </style:style>
    <style:style style:name="T171" style:family="text">
      <style:text-properties fo:language="en" fo:country="US" fo:font-style="normal" fo:font-weight="bold" officeooo:rsid="07d3d34f" fo:background-color="#dddddd" loext:char-shading-value="0" style:font-style-asian="normal" style:font-weight-asian="bold" style:font-style-complex="normal" style:font-weight-complex="bold"/>
    </style:style>
    <style:style style:name="T172" style:family="text">
      <style:text-properties fo:language="en" fo:country="US" fo:font-style="normal" fo:font-weight="normal" officeooo:rsid="07e53690" fo:background-color="#dddddd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italic" fo:font-weight="bold" officeooo:rsid="07d3d34f" fo:background-color="#dddddd" loext:char-shading-value="0" style:font-style-asian="italic" style:font-weight-asian="bold" style:font-style-complex="italic" style:font-weight-complex="bold"/>
    </style:style>
    <style:style style:name="T174" style:family="text">
      <style:text-properties fo:language="en" fo:country="US" fo:font-style="italic" fo:font-weight="normal" officeooo:rsid="07f38426" fo:background-color="#dddddd" loext:char-shading-value="0" style:font-style-asian="italic" style:font-weight-asian="normal" style:font-style-complex="italic" style:font-weight-complex="normal"/>
    </style:style>
    <style:style style:name="T175" style:family="text">
      <style:text-properties fo:language="en" fo:country="US" fo:font-style="italic" fo:font-weight="normal" officeooo:rsid="07d3d34f" fo:background-color="#dddddd" loext:char-shading-value="0" style:font-style-asian="italic" style:font-weight-asian="normal" style:font-style-complex="italic" style:font-weight-complex="normal"/>
    </style:style>
    <style:style style:name="T176" style:family="text">
      <style:text-properties fo:language="en" fo:country="US" fo:font-style="italic" fo:font-weight="normal" officeooo:rsid="07e7b743" fo:background-color="transparent" loext:char-shading-value="0" style:font-style-asian="italic" style:font-weight-asian="normal" style:font-style-complex="italic" style:font-weight-complex="normal"/>
    </style:style>
    <style:style style:name="T177" style:family="text">
      <style:text-properties fo:language="en" fo:country="US" fo:font-weight="normal" officeooo:rsid="07e621f2" fo:background-color="transparent" loext:char-shading-value="0" style:font-weight-asian="normal" style:font-weight-complex="normal"/>
    </style:style>
    <style:style style:name="T178" style:family="text">
      <style:text-properties fo:language="en" fo:country="US" fo:font-weight="normal" officeooo:rsid="07e7dc8c" fo:background-color="transparent" loext:char-shading-value="0" style:font-weight-asian="normal" style:font-weight-complex="normal"/>
    </style:style>
    <style:style style:name="T179" style:family="text">
      <style:text-properties fo:language="en" fo:country="US" fo:font-style="italic" fo:font-weight="bold" officeooo:rsid="07e7dc8c" fo:background-color="transparent" loext:char-shading-value="0" style:font-style-asian="italic" style:font-weight-asian="bold" style:font-style-complex="italic" style:font-weight-complex="bold"/>
    </style:style>
    <style:style style:name="T180" style:family="text">
      <style:text-properties fo:language="en" fo:country="US" fo:font-weight="normal" officeooo:rsid="07f51f52" fo:background-color="transparent" loext:char-shading-value="0" style:font-weight-asian="normal" style:font-weight-complex="normal"/>
    </style:style>
    <style:style style:name="T181" style:family="text">
      <style:text-properties fo:language="en" fo:country="US" fo:font-style="italic" fo:font-weight="normal" officeooo:rsid="077024ff" fo:background-color="transparent" loext:char-shading-value="0" style:font-style-asian="italic" style:font-weight-asian="normal" style:font-style-complex="italic" style:font-weight-complex="normal"/>
    </style:style>
    <style:style style:name="T182" style:family="text">
      <style:text-properties fo:language="en" fo:country="US" fo:font-style="normal" fo:font-weight="normal" officeooo:rsid="07f51f52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italic" fo:font-weight="normal" officeooo:rsid="07f51f52" fo:background-color="transparent" loext:char-shading-value="0" style:font-style-asian="italic" style:font-weight-asian="normal" style:font-style-complex="italic" style:font-weight-complex="normal"/>
    </style:style>
    <style:style style:name="T184" style:family="text">
      <style:text-properties fo:language="en" fo:country="US" fo:font-style="normal" fo:font-weight="bold" officeooo:rsid="07f51f52" fo:background-color="transparent" loext:char-shading-value="0" style:font-style-asian="normal" style:font-weight-asian="bold" style:font-style-complex="normal" style:font-weight-complex="bold"/>
    </style:style>
    <style:style style:name="T185" style:family="text">
      <style:text-properties fo:language="en" fo:country="US" fo:font-style="normal" fo:font-weight="bold" officeooo:rsid="077024ff" fo:background-color="transparent" loext:char-shading-value="0" style:font-style-asian="normal" style:font-weight-asian="bold" style:font-style-complex="normal" style:font-weight-complex="bold"/>
    </style:style>
    <style:style style:name="T186" style:family="text">
      <style:text-properties fo:language="en" fo:country="US" fo:font-style="normal" fo:font-weight="normal" officeooo:rsid="07f51f52" fo:background-color="#dddddd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7e7dc8c" fo:background-color="#dddddd" loext:char-shading-value="0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80780fc" fo:background-color="#dddddd" loext:char-shading-value="0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810b52c" fo:background-color="#dddddd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italic" fo:font-weight="bold" officeooo:rsid="07f51f52" fo:background-color="transparent" loext:char-shading-value="0" style:font-style-asian="italic" style:font-weight-asian="bold" style:font-style-complex="italic" style:font-weight-complex="bold"/>
    </style:style>
    <style:style style:name="T191" style:family="text">
      <style:text-properties fo:language="en" fo:country="US" fo:font-style="italic" fo:font-weight="normal" officeooo:rsid="07e7dc8c" fo:background-color="transparent" loext:char-shading-value="0" style:font-style-asian="italic" style:font-weight-asian="normal" style:font-style-complex="italic" style:font-weight-complex="normal"/>
    </style:style>
    <style:style style:name="T192" style:family="text">
      <style:text-properties fo:language="en" fo:country="US" fo:font-weight="normal" officeooo:rsid="07e976e2" fo:background-color="transparent" loext:char-shading-value="0" style:font-weight-asian="normal" style:font-weight-complex="normal"/>
    </style:style>
    <style:style style:name="T193" style:family="text">
      <style:text-properties fo:language="en" fo:country="US" fo:font-style="normal" fo:font-weight="normal" officeooo:rsid="07e976e2" fo:background-color="#dddddd" loext:char-shading-value="0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weight="normal" officeooo:rsid="0807e5f2" fo:background-color="transparent" loext:char-shading-value="0" style:font-weight-asian="normal" style:font-weight-complex="normal"/>
    </style:style>
    <style:style style:name="T195" style:family="text">
      <style:text-properties fo:language="en" fo:country="US" fo:font-weight="bold" officeooo:rsid="07e976e2" fo:background-color="transparent" loext:char-shading-value="0" style:font-weight-asian="bold" style:font-weight-complex="bold"/>
    </style:style>
    <style:style style:name="T196" style:family="text">
      <style:text-properties fo:language="en" fo:country="US" fo:font-style="italic" fo:font-weight="normal" officeooo:rsid="07e976e2" fo:background-color="transparent" loext:char-shading-value="0" style:font-style-asian="italic" style:font-weight-asian="normal" style:font-style-complex="italic" style:font-weight-complex="normal"/>
    </style:style>
    <style:style style:name="T197" style:family="text">
      <style:text-properties fo:language="en" fo:country="US" fo:font-weight="normal" officeooo:rsid="07eb6bb2" fo:background-color="transparent" loext:char-shading-value="0" style:font-weight-asian="normal" style:font-weight-complex="normal"/>
    </style:style>
    <style:style style:name="T198" style:family="text">
      <style:text-properties fo:language="en" fo:country="US" officeooo:rsid="00704232"/>
    </style:style>
    <style:style style:name="T199" style:family="text">
      <style:text-properties fo:language="en" fo:country="US" fo:font-weight="bold" officeooo:rsid="008ceef7" style:font-weight-asian="bold" style:font-weight-complex="bold"/>
    </style:style>
    <style:style style:name="T200" style:family="text">
      <style:text-properties fo:language="en" fo:country="US" fo:font-weight="bold" officeooo:rsid="010b0b47" style:font-weight-asian="bold" style:font-weight-complex="bold"/>
    </style:style>
    <style:style style:name="T201" style:family="text">
      <style:text-properties fo:language="en" fo:country="US" officeooo:rsid="00bb70dd"/>
    </style:style>
    <style:style style:name="T202" style:family="text">
      <style:text-properties fo:language="en" fo:country="US" fo:font-weight="bold" officeooo:rsid="00704232" style:font-weight-asian="bold" style:font-weight-complex="bold"/>
    </style:style>
    <style:style style:name="T203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204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205" style:family="text">
      <style:text-properties fo:language="en" fo:country="US" fo:font-weight="bold" officeooo:rsid="07bcd6a3" fo:background-color="#fff200" loext:char-shading-value="0" style:font-weight-asian="bold" style:font-weight-complex="bold"/>
    </style:style>
    <style:style style:name="T206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07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208" style:family="text">
      <style:text-properties fo:language="en" fo:country="US" fo:font-weight="bold" officeooo:rsid="007f05cd" fo:background-color="#fff200" loext:char-shading-value="0" style:font-weight-asian="bold" style:font-weight-complex="bold"/>
    </style:style>
    <style:style style:name="T209" style:family="text">
      <style:text-properties officeooo:rsid="06ae9e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<text:span text:style-name="T1">Intro</text:span> ###</text:p>
      <text:p text:style-name="P2"/>
      <text:p text:style-name="P3"><text:span text:style-name="T2">Here are some </text:span><text:span text:style-name="T3">Java </text:span><text:span text:style-name="T4">IDE</text:span><text:span text:style-name="T5"> </text:span><text:span text:style-name="T6">improvements </text:span><text:span text:style-name="T7">of </text:span><text:span text:style-name="T8">Eclipse </text:span><text:span text:style-name="T9">202</text:span><text:span text:style-name="T10">6</text:span><text:span text:style-name="T9">-</text:span><text:span text:style-name="T10">06</text:span><text:span text:style-name="T11"> </text:span><text:span text:style-name="T12">including</text:span><text:span text:style-name="T11"> general </text:span><text:span text:style-name="T13">and Git </text:span><text:span text:style-name="T11">improvements, </text:span><text:span text:style-name="T14">improvements </text:span><text:span text:style-name="T12">that have been added </text:span><text:span text:style-name="T15">since the last release in </text:span><text:span text:style-name="T16">March</text:span><text:span text:style-name="T15"> </text:span><text:span text:style-name="T12">three months </text:span><text:span text:style-name="T17">ago</text:span><text:span text:style-name="T18">.</text:span></text:p>
      <text:p text:style-name="P4"/>
      <text:p text:style-name="P5"/>
      <text:p text:style-name="P6"><text:span text:style-name="T19">### </text:span><text:span text:style-name="T20">J</text:span><text:span text:style-name="T21">ava</text:span><text:span text:style-name="T22"> </text:span><text:span text:style-name="T19">###</text:span></text:p>
      <text:p text:style-name="P7"/>
      <text:p text:style-name="P8"><text:span text:style-name="T23">Java </text:span><text:span text:style-name="T24">2</text:span><text:span text:style-name="T10">6</text:span><text:span text:style-name="T23"> support</text:span><text:span text:style-name="T25"> i</text:span><text:span text:style-name="T26">s</text:span><text:span text:style-name="T25"> now </text:span><text:span text:style-name="T23">built-in</text:span><text:span text:style-name="T25">, enabling you to </text:span><text:span text:style-name="T27">create</text:span><text:span text:style-name="T25">, edit, and compile </text:span><text:span text:style-name="T27">Java 26 projects</text:span><text:span text:style-name="T25">, </text:span><text:span text:style-name="T28">[…</text:span><text:span text:style-name="T29">]</text:span><text:span text:style-name="T25"> given that a Java 26 JDK is installed on your system.</text:span></text:p>
      <text:p text:style-name="P9"/>
      <text:p text:style-name="P10">In the <text:span text:style-name="T30">Java editor</text:span>, there are two new <text:span text:style-name="T30">quick assists</text:span>.</text:p>
      <text:p text:style-name="P11"><text:span text:style-name="T31">One is for turning a </text:span><text:span text:style-name="T32">string</text:span><text:span text:style-name="T31"> </text:span><text:span text:style-name="T33">that </text:span><text:span text:style-name="T34">contain</text:span><text:span text:style-name="T35">s</text:span><text:span text:style-name="T34"> a line break</text:span><text:span text:style-name="T31"> into a multi-line </text:span><text:span text:style-name="T32">text block</text:span><text:span text:style-name="T31">: Go to the String, hit </text:span><text:span text:style-name="T32">Ctrl+1</text:span><text:span text:style-name="T31"> </text:span><text:span text:style-name="T28">[…</text:span><text:span text:style-name="T29">]</text:span><text:span text:style-name="T31"> and choose </text:span><text:span text:style-name="T36">Convert String to Text Block</text:span><text:span text:style-name="T31">. </text:span><text:span text:style-name="T37">That’s better to, </text:span><text:span text:style-name="T38">um,</text:span><text:span text:style-name="T37"> read, isn’t it</text:span><text:span text:style-name="T12">!</text:span></text:p>
      <text:p text:style-name="P12"><text:span text:style-name="T39">The other one is </text:span><text:span text:style-name="T31">for turning </text:span><text:span text:style-name="T39">a qualified </text:span><text:span text:style-name="T33">name </text:span><text:span text:style-name="T39">into a simple </text:span><text:span text:style-name="T33">on</text:span><text:span text:style-name="T39">e and the corresponding import statement: </text:span><text:span text:style-name="T31">Go to the </text:span><text:span text:style-name="T40">line</text:span><text:span text:style-name="T31">, hit </text:span><text:span text:style-name="T32">Ctrl+1</text:span><text:span text:style-name="T31"> </text:span><text:span text:style-name="T28">[…</text:span><text:span text:style-name="T29">]</text:span><text:span text:style-name="T31"> and choose </text:span><text:span text:style-name="T36">Replace qualified name</text:span><text:span text:style-name="T39">. </text:span><text:span text:style-name="T41">This is also better to </text:span><text:span text:style-name="T37">read, isn’t it </text:span><text:span text:style-name="T12">!</text:span></text:p>
      <text:p text:style-name="P9"/>
      <text:p text:style-name="P13"><text:span text:style-name="T42">There </text:span><text:span text:style-name="T43">is also a</text:span><text:span text:style-name="T42"> new </text:span><text:span text:style-name="T44">quick fix</text:span><text:span text:style-name="T42"> for </text:span><text:span text:style-name="T44">null annotation</text:span><text:span text:style-name="T45"> to fix a </text:span><text:span text:style-name="T46">“Null type mismatch”</text:span><text:span text:style-name="T47"> problem</text:span><text:span text:style-name="T48"> by </text:span><text:span text:style-name="T49">changing</text:span><text:span text:style-name="T45"> </text:span><text:span text:style-name="T50">the used</text:span><text:span text:style-name="T51"> </text:span><text:span text:style-name="T52">nullable</text:span><text:span text:style-name="T53"> parameter</text:span><text:span text:style-name="T51"> </text:span><text:span text:style-name="T53">or</text:span><text:span text:style-name="T54"> </text:span><text:span text:style-name="T55">a</text:span><text:span text:style-name="T56"> </text:span><text:span text:style-name="T57">nullable</text:span><text:span text:style-name="T56"> </text:span><text:span text:style-name="T58">return value</text:span><text:span text:style-name="T51"> of a method</text:span><text:span text:style-name="T56"> </text:span><text:span text:style-name="T50">to</text:span><text:span text:style-name="T56"> </text:span><text:span text:style-name="T52">non-null</text:span><text:span text:style-name="T56">: </text:span><text:span text:style-name="T31">Go to the </text:span><text:span text:style-name="T47">line where the </text:span><text:span text:style-name="T46">“Null type mismatch”</text:span><text:span text:style-name="T47"> problem is shown</text:span><text:span text:style-name="T31">, hit </text:span><text:span text:style-name="T32">Ctrl+1</text:span><text:span text:style-name="T31"> </text:span><text:span text:style-name="T28">[…</text:span><text:span text:style-name="T29">]</text:span><text:span text:style-name="T31"> and choose </text:span><text:span text:style-name="T36">Convert to </text:span><text:span text:style-name="T59">non-null</text:span><text:span text:style-name="T31">. </text:span><text:span text:style-name="T28">[…</text:span><text:span text:style-name="T29">]</text:span><text:span text:style-name="T31"> </text:span><text:span text:style-name="T60">This quick fix </text:span><text:span text:style-name="T61">will be</text:span><text:span text:style-name="T60"> </text:span><text:span text:style-name="T62">only provided if</text:span><text:span text:style-name="T60"> </text:span><text:span text:style-name="T61">the fix </text:span><text:span text:style-name="T33">does</text:span><text:span text:style-name="T61">n’t lead to another</text:span><text:span text:style-name="T60"> </text:span><text:span text:style-name="T46">“Null type mismatch”</text:span><text:span text:style-name="T47"> problem</text:span><text:span text:style-name="T49">.</text:span></text:p>
      <text:p text:style-name="P14"/>
      <text:p text:style-name="P15"><text:span text:style-name="T49">The </text:span><text:span text:style-name="T36">Convert Class to Record</text:span><text:span text:style-name="T48"> </text:span><text:span text:style-name="T63">refactoring</text:span><text:span text:style-name="T48">, </text:span><text:span text:style-name="T43">which is also available as </text:span><text:span text:style-name="T64">quick assist</text:span><text:span text:style-name="T43">,</text:span><text:span text:style-name="T49"> has been improved</text:span><text:span text:style-name="T48"> to be </text:span><text:span text:style-name="T63">applicable</text:span><text:span text:style-name="T48">, </text:span><text:span text:style-name="T65">for instance, </text:span><text:span text:style-name="T49">also to</text:span><text:span text:style-name="T48"> classes </text:span><text:span text:style-name="T49">containing</text:span><text:span text:style-name="T48"> </text:span><text:span text:style-name="T66">additional</text:span><text:span text:style-name="T63"> methods</text:span><text:span text:style-name="T48"> </text:span><text:span text:style-name="T65">to the getter methods</text:span><text:span text:style-name="T48">, </text:span><text:span text:style-name="T28">[…</text:span><text:span text:style-name="T29">]</text:span><text:span text:style-name="T48"> and/or </text:span><text:span text:style-name="T67">with more than one</text:span><text:span text:style-name="T63"> constructor</text:span><text:span text:style-name="T48">.</text:span></text:p>
      <text:p text:style-name="P16"/>
      <text:p text:style-name="P3"><text:span text:style-name="T3">Folding</text:span><text:span text:style-name="T68"> is now </text:span><text:span text:style-name="T69">faster</text:span><text:span text:style-name="T48">, </text:span><text:span text:style-name="T43">especially for large files with many foldable elements.</text:span><text:span text:style-name="T48"> The entire body will now be folded, </text:span><text:span text:style-name="T63">including the closing </text:span><text:span text:style-name="T69">brace</text:span><text:span text:style-name="T48">, </text:span><text:span text:style-name="T43">which was not the case before.</text:span></text:p>
      <text:p text:style-name="P17"/>
      <text:p text:style-name="P18"><text:span text:style-name="T68">When debugging, </text:span><text:span text:style-name="T70">Step Over</text:span><text:span text:style-name="T68"> also </text:span><text:span text:style-name="T69">pauses</text:span><text:span text:style-name="T68"> at locations where you might </text:span><text:span text:style-name="T69">n</text:span><text:span text:style-name="T71">either</text:span><text:span text:style-name="T69"> expect nor want</text:span><text:span text:style-name="T68"> it to. To </text:span><text:span text:style-name="T72">enable </text:span><text:span text:style-name="T73">s</text:span><text:span text:style-name="T63">tatement-</text:span><text:span text:style-name="T73">l</text:span><text:span text:style-name="T63">evel </text:span><text:span text:style-name="T73">s</text:span><text:span text:style-name="T63">tepping</text:span><text:span text:style-name="T68">, </text:span><text:span text:style-name="T72">go to the </text:span><text:span text:style-name="T74">preferences</text:span><text:span text:style-name="T72"> </text:span><text:span text:style-name="T28">[…</text:span><text:span text:style-name="T29">]</text:span><text:span text:style-name="T72"> </text:span><text:span text:style-name="T75">Java</text:span><text:span text:style-name="T72"> </text:span><text:span text:style-name="T28">[…</text:span><text:span text:style-name="T29">]</text:span><text:span text:style-name="T72"> </text:span><text:span text:style-name="T75">Debug</text:span><text:span text:style-name="T72"> </text:span><text:span text:style-name="T28">[…</text:span><text:span text:style-name="T29">]</text:span><text:span text:style-name="T72"> </text:span><text:span text:style-name="T75">Step Filtering</text:span><text:span text:style-name="T72">, </text:span><text:span text:style-name="T28">[…</text:span><text:span text:style-name="T29">]</text:span><text:span text:style-name="T72"> click </text:span><text:span text:style-name="T75">Use Step </text:span><text:span text:style-name="T76">F</text:span><text:span text:style-name="T75">ilter</text:span><text:span text:style-name="T76">s</text:span><text:span text:style-name="T72"> </text:span><text:span text:style-name="T28">[…</text:span><text:span text:style-name="T29">]</text:span><text:span text:style-name="T72"> and </text:span><text:span text:style-name="T77">m</text:span><text:span text:style-name="T72">ake sure </text:span><text:span text:style-name="T36">Filter intermediate instructions while stepping</text:span><text:span text:style-name="T68"> </text:span><text:span text:style-name="T72">is ticked. </text:span><text:span text:style-name="T77">With this, </text:span><text:span text:style-name="T78">Step Over</text:span><text:span text:style-name="T77"> now </text:span><text:span text:style-name="T73">skips </text:span><text:span text:style-name="T63">intermediate</text:span><text:span text:style-name="T48"> bytecode instructions</text:span><text:span text:style-name="T77"> within a statement </text:span><text:span text:style-name="T79">as you can see here: </text:span><text:span text:style-name="T80">[…</text:span><text:span text:style-name="T81">]</text:span><text:span text:style-name="T79"> All three intermediate steps will be skipped. </text:span><text:span text:style-name="T80">[…</text:span><text:span text:style-name="T81">]</text:span><text:span text:style-name="T43"> </text:span><text:span text:style-name="T82">Ni</text:span><text:span text:style-name="T43">ce, isn’t it?</text:span></text:p>
      <text:p text:style-name="P17"/>
      <text:p text:style-name="P19"><text:span text:style-name="T83">And there is another nice improvement: W</text:span><text:span text:style-name="T43">hen stepping through a Java class for which the source code is not available,</text:span><text:span text:style-name="T48"> the </text:span><text:span text:style-name="T63">line</text:span><text:span text:style-name="T48"> with the next bytecode instruction to execute </text:span><text:span text:style-name="T71">i</text:span><text:span text:style-name="T84">s</text:span><text:span text:style-name="T85"> now </text:span><text:span text:style-name="T63">highlighted</text:span><text:span text:style-name="T48"> in the </text:span><text:span text:style-name="T86">Class File Viewer</text:span><text:span text:style-name="T85">.</text:span></text:p>
      <text:p text:style-name="P20"/>
      <text:p text:style-name="P20"/>
      <text:p text:style-name="P21"><text:span text:style-name="T19">### </text:span><text:span text:style-name="T87">General</text:span><text:span text:style-name="T88"> </text:span><text:span text:style-name="T19">###</text:span></text:p>
      <text:p text:style-name="P22"/>
      <text:p text:style-name="P23"><text:span text:style-name="T89">I</text:span><text:span text:style-name="T90">n the </text:span><text:span text:style-name="T91">Variables</text:span><text:span text:style-name="T90"> view's </text:span><text:span text:style-name="T92">right-click menu</text:span><text:span text:style-name="T93">, </text:span><text:span text:style-name="T94">y</text:span><text:span text:style-name="T95">ou</text:span><text:span text:style-name="T96"> can</text:span><text:span text:style-name="T95"> </text:span><text:span text:style-name="T97">now </text:span><text:span text:style-name="T98">copy</text:span><text:span text:style-name="T95"> the </text:span><text:span text:style-name="T98">variable names</text:span><text:span text:style-name="T95"> </text:span><text:span text:style-name="T99">only, without their values</text:span><text:span text:style-name="T95"> </text:span><text:span text:style-name="T28">[…</text:span><text:span text:style-name="T29">]</text:span><text:span text:style-name="T95"> </text:span><text:span text:style-name="T94">or</text:span><text:span text:style-name="T95"> </text:span><text:span text:style-name="T94">alternative</text:span><text:span text:style-name="T33">ly</text:span><text:span text:style-name="T94">, </text:span><text:span text:style-name="T97">the </text:span><text:span text:style-name="T95">entire rows including the current values. </text:span><text:span text:style-name="T28">[…</text:span><text:span text:style-name="T29">]</text:span><text:span text:style-name="T95"> The same applies to the </text:span><text:span text:style-name="T100">Expressions</text:span><text:span text:style-name="T95"> view, where you can now </text:span><text:span text:style-name="T98">copy expressions</text:span><text:span text:style-name="T95"> without the values. </text:span><text:span text:style-name="T43">Th</text:span><text:span text:style-name="T101">ese are </text:span><text:span text:style-name="T82">minor general</text:span><text:span text:style-name="T43"> improvement</text:span><text:span text:style-name="T101">s</text:span><text:span text:style-name="T43">, not </text:span><text:span text:style-name="T101">just</text:span><text:span text:style-name="T43"> for</text:span><text:span text:style-name="T102"> </text:span><text:span text:style-name="T43">Java.</text:span></text:p>
      <text:p text:style-name="P24"/>
      <text:p text:style-name="P25"><text:span text:style-name="T33">O</text:span><text:span text:style-name="T103">ther useful general platform improvement are the new </text:span><text:span text:style-name="T3">global search navigation shortcuts</text:span><text:span text:style-name="T103">:</text:span></text:p>
      <text:list text:style-name="L1">
        <text:list-item>
          <text:p text:style-name="P26"><text:span text:style-name="T104">Alt</text:span><text:span text:style-name="T105">+</text:span><text:span text:style-name="T104">.</text:span><text:span text:style-name="T103"> </text:span><text:span text:style-name="T106">jump</text:span><text:span text:style-name="T107">s</text:span><text:span text:style-name="T106"> to the </text:span><text:span text:style-name="T108">next</text:span><text:span text:style-name="T106"> search results</text:span></text:p>
        </text:list-item>
        <text:list-item>
          <text:p text:style-name="P26"><text:span text:style-name="T28">[…</text:span><text:span text:style-name="T29">]</text:span><text:span text:style-name="T106"> and </text:span><text:span text:style-name="T103"><text:s/></text:span><text:span text:style-name="T104">Alt</text:span><text:span text:style-name="T105">+</text:span><text:span text:style-name="T104">,</text:span><text:span text:style-name="T103"> </text:span><text:span text:style-name="T107">j</text:span><text:span text:style-name="T106">ump</text:span><text:span text:style-name="T107">s</text:span><text:span text:style-name="T106"> to the </text:span><text:span text:style-name="T108">previous</text:span><text:span text:style-name="T106"> search result.</text:span></text:p>
        </text:list-item>
      </text:list>
      <text:p text:style-name="P27"><text:span text:style-name="T43">Unlike </text:span><text:span text:style-name="T109">Ctrl</text:span><text:span text:style-name="T110">+</text:span><text:span text:style-name="T109">,</text:span><text:span text:style-name="T43"> and </text:span><text:span text:style-name="T109">Ctrl</text:span><text:span text:style-name="T110">+</text:span><text:span text:style-name="T109">.</text:span><text:span text:style-name="T43"> which </text:span><text:span text:style-name="T64">only</text:span><text:span text:style-name="T43"> work when the </text:span><text:span text:style-name="T109">Search</text:span><text:span text:style-name="T64"> view</text:span><text:span text:style-name="T43"> is in </text:span><text:span text:style-name="T64">focus</text:span><text:span text:style-name="T43">,</text:span><text:span text:style-name="T103"> </text:span><text:span text:style-name="T111">Alt</text:span><text:span text:style-name="T112">+</text:span><text:span text:style-name="T108">,</text:span><text:span text:style-name="T106"> and </text:span><text:span text:style-name="T111">Alt</text:span><text:span text:style-name="T112">+</text:span><text:span text:style-name="T113">.</text:span><text:span text:style-name="T103"> </text:span><text:span text:style-name="T106">work globally, </text:span><text:span text:style-name="T43">no matter which editor or view is activated.</text:span></text:p>
      <text:p text:style-name="P28"/>
      <text:p text:style-name="P29"><text:span text:style-name="T114">In the text compare, s</text:span>ome default<text:span text:style-name="T114">s</text:span> <text:span text:style-name="T115">have been</text:span> change<text:span text:style-name="T114">d:</text:span></text:p>
      <text:list text:style-name="L2">
        <text:list-item>
          <text:p text:style-name="P30"><text:span text:style-name="T116">Following common convention, by default the </text:span><text:span text:style-name="T117">original or base</text:span><text:span text:style-name="T116"> content is now displayed </text:span><text:span text:style-name="T117">on the left</text:span><text:span text:style-name="T116"> and the </text:span><text:span text:style-name="T117">local or modified</text:span><text:span text:style-name="T116"> content is displayed </text:span><text:span text:style-name="T117">on the right</text:span><text:span text:style-name="T116">, </text:span><text:span text:style-name="T43">rather than the other way round as </text:span><text:span text:style-name="T102">it was </text:span><text:span text:style-name="T43">in the past.</text:span></text:p>
        </text:list-item>
        <text:list-item>
          <text:p text:style-name="P31">In <text:span text:style-name="T118">the</text:span> <text:span text:style-name="T119">Outline</text:span> view, the <text:span text:style-name="T30">structure</text:span> is now displayed <text:span text:style-name="T120">by default, </text:span>if possible.</text:p>
        </text:list-item>
        <text:list-item>
          <text:p text:style-name="P32"><text:span text:style-name="T121">T</text:span><text:span text:style-name="T122">he </text:span><text:span text:style-name="T123">connections</text:span><text:span text:style-name="T122"> between the differences on the left and on the right are now displayed </text:span><text:span text:style-name="T123">a bit </text:span><text:span text:style-name="T124">more </text:span><text:span text:style-name="T123">clear</text:span><text:span text:style-name="T125">ly</text:span><text:span text:style-name="T122">, </text:span><text:span text:style-name="T126">rather than </text:span><text:span text:style-name="T127">with a</text:span><text:span text:style-name="T126"> thin line as </text:span><text:span text:style-name="T128">in the past</text:span><text:span text:style-name="T126">.</text:span></text:p>
        </text:list-item>
      </text:list>
      <text:p text:style-name="P33">If you don't like these new defaults, you <text:span text:style-name="T30">can revert</text:span> them in the <text:span text:style-name="T30">preferences</text:span> <text:span text:style-name="T129">[…</text:span><text:span text:style-name="T130">]</text:span> <text:span text:style-name="T119">General</text:span> <text:span text:style-name="T129">[…</text:span><text:span text:style-name="T130">]</text:span> <text:span text:style-name="T119">Compare/Patch</text:span><text:span text:style-name="T131">:</text:span></text:p>
      <text:list text:style-name="L3">
        <text:list-item>
          <text:p text:style-name="P34"><text:span text:style-name="T132">I</text:span>n the <text:span text:style-name="T30">tab </text:span><text:span text:style-name="T119">General</text:span>, <text:span text:style-name="T132">uncheck</text:span><text:span text:style-name="T120"> </text:span><text:span text:style-name="T133">“</text:span><text:span text:style-name="T119">Show structure compare in Outline view when possible</text:span><text:span text:style-name="T134">”</text:span><text:span text:style-name="T135">, </text:span><text:span text:style-name="T129">[…</text:span><text:span text:style-name="T130">]</text:span></text:p>
        </text:list-item>
        <text:list-item>
          <text:p text:style-name="P34"><text:span text:style-name="T132">and </text:span>in the <text:span text:style-name="T30">tab </text:span><text:span text:style-name="T119">Text Compare </text:span><text:span text:style-name="T129">[…</text:span><text:span text:style-name="T130">]</text:span></text:p>
          <text:list>
            <text:list-item>
              <text:p text:style-name="P34"><text:span text:style-name="T132">uncheck</text:span> <text:span text:style-name="T134">“</text:span><text:span text:style-name="T119">Swap left and right</text:span><text:span text:style-name="T134">”</text:span>, <text:span text:style-name="T129">[…</text:span><text:span text:style-name="T130">]</text:span></text:p>
            </text:list-item>
            <text:list-item>
              <text:p text:style-name="P34"><text:span text:style-name="T120">and </text:span><text:span text:style-name="T132">check</text:span> <text:span text:style-name="T134">“</text:span><text:span text:style-name="T119">Connect ranges with single line</text:span><text:span text:style-name="T134">”</text:span>.</text:p>
            </text:list-item>
          </text:list>
        </text:list-item>
      </text:list>
      <text:p text:style-name="P35"><text:span text:style-name="T136">Local Java</text:span><text:span text:style-name="T137"> file</text:span><text:span text:style-name="T138">s</text:span><text:span text:style-name="T137"> are now shown in the Compare editor </text:span><text:span text:style-name="T139">with </text:span><text:span text:style-name="T140">semantic highlighting</text:span><text:span text:style-name="T139"> </text:span><text:span text:style-name="T126">instead of syntax highlighting only,</text:span><text:span text:style-name="T139"> </text:span><text:span text:style-name="T28">[…</text:span><text:span text:style-name="T29">]</text:span></text:p>
      <text:p text:style-name="P36"><text:span text:style-name="T141">and</text:span> a <text:span text:style-name="T30">Git commit</text:span> is now displayed with <text:span text:style-name="T142">the commit</text:span> author <text:span text:style-name="T30">date</text:span> <text:span text:style-name="T142">in addition.</text:span></text:p>
      <text:p text:style-name="P37"/>
      <text:p text:style-name="P38"><text:span text:style-name="T143">W</text:span><text:span text:style-name="T138">hen </text:span><text:span text:style-name="T144">Show Whitespace Characters</text:span><text:span text:style-name="T138"> is enabled, </text:span><text:span text:style-name="T140">zero-width spaces and characters</text:span><text:span text:style-name="T139"> </text:span><text:span text:style-name="T138">are shown as </text:span><text:span text:style-name="T140">ZWSP</text:span><text:span text:style-name="T139"> </text:span><text:span text:style-name="T126">in text-based editors.</text:span></text:p>
      <text:p text:style-name="P39"/>
      <text:p text:style-name="P40"><text:span text:style-name="T145">When importing projects, </text:span><text:span text:style-name="T146">e. g. via </text:span><text:span text:style-name="T147">File</text:span><text:span text:style-name="T146"> </text:span><text:span text:style-name="T80">[…</text:span><text:span text:style-name="T81">]</text:span><text:span text:style-name="T146"> </text:span><text:span text:style-name="T147">Open Projects from File System</text:span><text:span text:style-name="T146">,</text:span><text:span text:style-name="T145"> there is a new option “</text:span><text:span text:style-name="T148">Skip folders starting with '.'</text:span><text:span text:style-name="T139">” </text:span><text:span text:style-name="T145">which is </text:span><text:span text:style-name="T149">enabled by default</text:span><text:span text:style-name="T145">. </text:span><text:span text:style-name="T126">That's probably what you want in almost all cases, and scanning fewer files takes less time.</text:span></text:p>
      <text:p text:style-name="P41"/>
      <text:p text:style-name="P42">There are new options with which you can customize the look and feel of your Eclipse IDE, as well as some options that have been removed. In the <text:span text:style-name="T30">preferences</text:span> <text:span text:style-name="T129">[…</text:span><text:span text:style-name="T130">]</text:span> <text:span text:style-name="T150">General</text:span><text:span text:style-name="T151"> </text:span><text:span text:style-name="T129">[…</text:span><text:span text:style-name="T130">]</text:span><text:span text:style-name="T151"> </text:span><text:span text:style-name="T150">Appearance</text:span><text:span text:style-name="T151">,</text:span></text:p>
      <text:list text:style-name="L4">
        <text:list-item>
          <text:p text:style-name="P43">the <text:span text:style-name="T119">Classic</text:span><text:span text:style-name="T30"> theme</text:span> is <text:span text:style-name="T30">no longer</text:span> available,</text:p>
        </text:list-item>
        <text:list-item>
          <text:p text:style-name="P43">and the <text:span text:style-name="T134">“</text:span><text:span text:style-name="T119">Use Round Tabs</text:span><text:span text:style-name="T134">”</text:span> option is <text:span text:style-name="T30">gone</text:span>, <text:span text:style-name="T152">too.</text:span></text:p>
        </text:list-item>
        <text:list-item>
          <text:p text:style-name="P44"><text:span text:style-name="T153">But </text:span>you can now <text:span text:style-name="T30">manage</text:span> which <text:span text:style-name="T30">theme</text:span> is initial<text:span text:style-name="T118">ly</text:span> used <text:span text:style-name="T153">for a</text:span> <text:span text:style-name="T30">fresh workspace</text:span>.</text:p>
        </text:list-item>
        <text:list-item>
          <text:p text:style-name="P45"><text:span text:style-name="T154">And there is a </text:span><text:span text:style-name="T155">new option</text:span><text:span text:style-name="T154"> you might like, </text:span><text:span text:style-name="T156">but</text:span><text:span text:style-name="T154"> which is </text:span><text:span text:style-name="T155">disabled by default</text:span><text:span text:style-name="T154">: </text:span><text:span text:style-name="T36">Indicate unsaved changes by overlaying the close button</text:span><text:span text:style-name="T157"> – </text:span><text:span text:style-name="T154">With this, </text:span><text:span text:style-name="T155">unsaved changes</text:span><text:span text:style-name="T154"> will be indicated </text:span><text:span text:style-name="T158">more </text:span><text:span text:style-name="T157">clear</text:span><text:span text:style-name="T65">ly</text:span><text:span text:style-name="T158"> </text:span><text:span text:style-name="T154">in the tab by a </text:span><text:span text:style-name="T155">large dot</text:span><text:span text:style-name="T154"> to the right, </text:span><text:span text:style-name="T126">rather than by displaying the name with a leading asterisk.</text:span><text:span text:style-name="T154"> </text:span><text:span text:style-name="T126">What do you think? Should this become the </text:span><text:span text:style-name="T159">new</text:span><text:span text:style-name="T126"> default?</text:span></text:p>
        </text:list-item>
      </text:list>
      <text:p text:style-name="P46"/>
      <text:p text:style-name="P47"/>
      <text:p text:style-name="P48"><text:span text:style-name="T160">### </text:span><text:span text:style-name="T161">Git</text:span><text:span text:style-name="T162"> </text:span><text:span text:style-name="T160">###</text:span></text:p>
      <text:p text:style-name="P22"/>
      <text:p text:style-name="P49">The built-in <text:span text:style-name="T30">Git</text:span> support has been improved as well.</text:p>
      <text:p text:style-name="P50"/>
      <text:p text:style-name="P51"><text:span text:style-name="T163">To </text:span><text:span text:style-name="T164">automatically fetch</text:span><text:span text:style-name="T163"> </text:span><text:span text:style-name="T165">from</text:span><text:span text:style-name="T163"> remotes periodically in the background, </text:span><text:span text:style-name="T165">enable t</text:span><text:span text:style-name="T163">he new </text:span><text:span text:style-name="T3">Auto Fetch</text:span><text:span text:style-name="T163"> feature in the </text:span><text:span text:style-name="T164">preferences</text:span><text:span text:style-name="T163"> </text:span><text:span text:style-name="T28">[…</text:span><text:span text:style-name="T29">]</text:span><text:span text:style-name="T163"> </text:span><text:span text:style-name="T166">Version Control</text:span><text:span text:style-name="T163"> </text:span><text:span text:style-name="T28">[…</text:span><text:span text:style-name="T29">]</text:span><text:span text:style-name="T163"> </text:span><text:span text:style-name="T166">Git</text:span><text:span text:style-name="T163">: </text:span><text:span text:style-name="T165">Switch</text:span><text:span text:style-name="T163"> </text:span><text:span text:style-name="T166">Auto Fetch</text:span><text:span text:style-name="T163"> from </text:span><text:span text:style-name="T166">Disabled</text:span><text:span text:style-name="T163"> to </text:span><text:span text:style-name="T166">Default remotes</text:span><text:span text:style-name="T163"> or </text:span><text:span text:style-name="T166">All Remotes</text:span><text:span text:style-name="T163">. The minimum fetch interval is five minutes to avoid overloading the Git servers with too many requests. </text:span><text:span text:style-name="T167">When</text:span><text:span text:style-name="T163"> </text:span><text:span text:style-name="T168">“</text:span><text:span text:style-name="T166">Refresh only when workbench is active</text:span><text:span text:style-name="T168">”</text:span><text:span text:style-name="T163"> </text:span><text:span text:style-name="T167">is enabled</text:span><text:span text:style-name="T163">, </text:span><text:span text:style-name="T164">fetches</text:span><text:span text:style-name="T163"> are </text:span><text:span text:style-name="T164">skipped</text:span><text:span text:style-name="T163"> when the workbench is </text:span><text:span text:style-name="T164">inactive</text:span><text:span text:style-name="T163">. To not interrupt </text:span><text:span text:style-name="T169">you</text:span><text:span text:style-name="T163">, no fetch results will be displayed</text:span><text:span text:style-name="T170"> and e</text:span><text:span text:style-name="T165">rrors, </text:span><text:span text:style-name="T169">if any,</text:span><text:span text:style-name="T163"> will be logged. </text:span><text:span text:style-name="T126">The </text:span><text:span text:style-name="T171">incoming changes</text:span><text:span text:style-name="T126"> will </text:span><text:span text:style-name="T172">just </text:span><text:span text:style-name="T126">show up automatically </text:span><text:span text:style-name="T172">thanks </text:span><text:span text:style-name="T173">Auto Fetch</text:span><text:span text:style-name="T126">. That’s </text:span><text:span text:style-name="T172">helpful</text:span><text:span text:style-name="T126">, isn’t it?</text:span></text:p>
      <text:p text:style-name="P52"/>
      <text:p text:style-name="P53"><text:span text:style-name="T126">Similar to </text:span><text:span text:style-name="T174">f</text:span><text:span text:style-name="T175">etch</text:span><text:span text:style-name="T126"> results,</text:span><text:span text:style-name="T163"> </text:span><text:span text:style-name="T176">p</text:span><text:span text:style-name="T168">ush</text:span><text:span text:style-name="T163"> results can now be displayed via a notification instead of a dialog: If you wish so, </text:span><text:span text:style-name="T177">in</text:span><text:span text:style-name="T163"> </text:span><text:span text:style-name="T164">preferences</text:span><text:span text:style-name="T163"> </text:span><text:span text:style-name="T28">[…</text:span><text:span text:style-name="T29">]</text:span><text:span text:style-name="T163"> </text:span><text:span text:style-name="T166">Version Control</text:span><text:span text:style-name="T163"> </text:span><text:span text:style-name="T28">[…</text:span><text:span text:style-name="T29">]</text:span><text:span text:style-name="T163"> </text:span><text:span text:style-name="T166">Git</text:span><text:span text:style-name="T163"> </text:span><text:span text:style-name="T28">[…</text:span><text:span text:style-name="T29">]</text:span><text:span text:style-name="T163"> </text:span><text:span text:style-name="T166">Confirmations and Warnings</text:span><text:span text:style-name="T163"> </text:span><text:span text:style-name="T28">[…</text:span><text:span text:style-name="T29">]</text:span><text:span text:style-name="T163"> </text:span><text:span text:style-name="T177">check </text:span><text:span text:style-name="T104">Use notification instead of dialog for push result</text:span><text:span text:style-name="T163">.</text:span></text:p>
      <text:p text:style-name="P53"><text:span text:style-name="T163">If in the push results a link to create a pull or merge request is detected, the </text:span><text:span text:style-name="T164">link</text:span><text:span text:style-name="T163"> will be </text:span><text:span text:style-name="T178">displayed</text:span><text:span text:style-name="T163"> </text:span><text:span text:style-name="T164">in</text:span><text:span text:style-name="T163"> the </text:span><text:span text:style-name="T164">notification</text:span><text:span text:style-name="T163"> as “</text:span><text:span text:style-name="T104">Create Pull Request…</text:span><text:span text:style-name="T163">”</text:span><text:span text:style-name="T178">.</text:span></text:p>
      <text:p text:style-name="P54"/>
      <text:p text:style-name="P55"><text:span text:style-name="T178">In the </text:span><text:span text:style-name="T179">History</text:span><text:span text:style-name="T178"> view, </text:span><text:span text:style-name="T180">the </text:span><text:span text:style-name="T181">“</text:span><text:span text:style-name="T148">All Changes in Repository</text:span><text:span text:style-name="T181">” </text:span><text:span text:style-name="T182">filter</text:span><text:span text:style-name="T183"> </text:span><text:span text:style-name="T28">[…</text:span><text:span text:style-name="T29">]</text:span><text:span text:style-name="T183"> and</text:span><text:span text:style-name="T181"> </text:span><text:span text:style-name="T184">sh</text:span><text:span text:style-name="T185">ow</text:span><text:span text:style-name="T184">ing</text:span><text:span text:style-name="T185"> all branches</text:span><text:span text:style-name="T139"> </text:span><text:span text:style-name="T186">rather than the current branch only</text:span><text:span text:style-name="T139"> </text:span><text:span text:style-name="T178">are now </text:span><text:span text:style-name="T140">enabled by default, </text:span><text:span text:style-name="T187">since hiding information</text:span><text:span text:style-name="T126"> </text:span><text:span text:style-name="T188">by default </text:span><text:span text:style-name="T189">has </text:span><text:span text:style-name="T126">caused confusion in the past.</text:span><text:span text:style-name="T139"> To get only the commits of a specific file or folder, change the filter to</text:span><text:span text:style-name="T180"> </text:span><text:span text:style-name="T181">“</text:span><text:span text:style-name="T148">All Changes </text:span><text:span text:style-name="T190">of</text:span><text:span text:style-name="T148"> Re</text:span><text:span text:style-name="T190">source</text:span><text:span text:style-name="T181">” </text:span><text:span text:style-name="T126">which was the default in the past.</text:span></text:p>
      <text:p text:style-name="P56"/>
      <text:p text:style-name="P57"><text:span text:style-name="T139">You can now </text:span><text:span text:style-name="T140">drag and drop</text:span><text:span text:style-name="T139"> files </text:span><text:span text:style-name="T140">from</text:span><text:span text:style-name="T139"> the </text:span><text:span text:style-name="T191">History</text:span><text:span text:style-name="T178"> view’</text:span><text:span text:style-name="T192">s</text:span><text:span text:style-name="T139"> </text:span><text:span text:style-name="T148">Revision Detail</text:span><text:span text:style-name="T139"> area </text:span><text:span text:style-name="T140">into</text:span><text:span text:style-name="T139"> the </text:span><text:span text:style-name="T140">editor area</text:span><text:span text:style-name="T139"> to open </text:span><text:span text:style-name="T192">the Working Tree version of </text:span><text:span text:style-name="T139">them, </text:span><text:span text:style-name="T193">or to any drop target that accepts files.</text:span><text:span text:style-name="T139"> </text:span><text:span text:style-name="T126">That’s </text:span><text:span text:style-name="T193">cool</text:span><text:span text:style-name="T126">, isn’t it?</text:span></text:p>
      <text:p text:style-name="P58"/>
      <text:p text:style-name="P59"><text:span text:style-name="T192">In </text:span><text:span text:style-name="T194">the</text:span><text:span text:style-name="T192"> </text:span><text:span text:style-name="T148">Repositories</text:span><text:span text:style-name="T139"> view’</text:span><text:span text:style-name="T192">s </text:span><text:span text:style-name="T195">right-click menu</text:span><text:span text:style-name="T192">, the </text:span><text:span text:style-name="T196">“</text:span><text:span text:style-name="T148">Import Projects</text:span><text:span text:style-name="T181">”</text:span><text:span text:style-name="T139"> </text:span><text:span text:style-name="T192">command has been moved into the </text:span><text:span text:style-name="T3">new </text:span><text:span text:style-name="T104">Projects</text:span><text:span text:style-name="T3"> submenu</text:span><text:span text:style-name="T139">, </text:span><text:span text:style-name="T194">which now contains</text:span><text:span text:style-name="T192">, </text:span><text:span text:style-name="T197">if applicable,</text:span><text:span text:style-name="T192"> the new </text:span><text:span text:style-name="T104">Close All Projects</text:span><text:span text:style-name="T139"> </text:span><text:span text:style-name="T28">[…</text:span><text:span text:style-name="T29">]</text:span><text:span text:style-name="T139"> </text:span><text:span text:style-name="T197">and </text:span><text:span text:style-name="T104">Open All Projects</text:span><text:span text:style-name="T139"> </text:span><text:span text:style-name="T197">commands </text:span><text:span text:style-name="T193">to close or open all projects of the selected repository.</text:span></text:p>
      <text:p text:style-name="P60"/>
      <text:p text:style-name="P61"/>
      <text:p text:style-name="P62">### Outro ###</text:p>
      <text:p text:style-name="P63"/>
      <text:p text:style-name="P64"><text:span text:style-name="T198">These were some of the </text:span><text:span text:style-name="T199">Java </text:span><text:span text:style-name="T200">IDE</text:span><text:span text:style-name="T198"> improvements </text:span><text:span text:style-name="T201">of the </text:span><text:span text:style-name="T202">quarterly </text:span><text:span text:style-name="T203">Rolling</text:span><text:span text:style-name="T204"> Release </text:span><text:span text:style-name="T205">June</text:span><text:span text:style-name="T206"> 202</text:span><text:span text:style-name="T205">6</text:span><text:span text:style-name="T198">.</text:span></text:p>
      <text:p text:style-name="P65"/>
      <text:p text:style-name="P66"><text:span text:style-name="T207">Thank</text:span><text:span text:style-name="T208">s</text:span><text:span text:style-name="T207"> for watching and happy coding!</text:span></text:p>
      <text:p text:style-name="P67">___</text:p>
      <text:p text:style-name="P68">Pronunciations:</text:p>
      <text:list text:style-name="L5">
        <text:list-item>
          <text:p text:style-name="P69">Git <text:tab/>/ɡɪt/</text:p>
        </text:list-item>
        <text:list-item>
          <text:p text:style-name="P69">YAML <text:tab/>/ˈjæməl/</text:p>
        </text:list-item>
        <text:list-item>
          <text:p text:style-name="P69">Vue.js <text:tab/>"view" J S</text:p>
        </text:list-item>
        <text:list-item>
          <text:p text:style-name="P69">RISC-V "<text:span text:style-name="T209">risc-five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14T08:46:58.207000000</meta:creation-date>
    <dc:date>2026-06-09T16:57:44.756382700</dc:date>
    <meta:editing-duration>P8DT12H21M33S</meta:editing-duration>
    <meta:editing-cycles>1176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53" meta:word-count="1253" meta:character-count="7190" meta:non-whitespace-character-count="6002"/>
    <meta:user-defined meta:name="DocumentEncoding">utf-8</meta:user-defined>
    <meta:user-defined meta:name="HTML" meta:value-type="boolean">true</meta:user-defined>
  </office:meta>
</office:document-meta>
</file>